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da63"/>
    </style:style>
    <style:style style:name="P2" style:family="paragraph" style:parent-style-name="Standard">
      <loext:graphic-properties draw:fill="solid" draw:fill-color="#1e1f22"/>
      <style:paragraph-properties fo:background-color="#1e1f22" fo:padding="0in" fo:border="none" style:shadow="none"/>
    </style:style>
    <style:style style:name="P3" style:family="paragraph" style:parent-style-name="Standard">
      <style:text-properties officeooo:rsid="001cd61b" officeooo:paragraph-rsid="001cd61b"/>
    </style:style>
    <style:style style:name="T1" style:family="text">
      <style:text-properties officeooo:rsid="001ada63"/>
    </style:style>
    <style:style style:name="T2" style:family="text">
      <style:text-properties fo:color="#cf8e6d" loext:opacity="100%" fo:font-family="'JetBrains Mono'" style:font-family-generic="roman" style:font-pitch="variable" fo:font-size="9pt" fo:font-style="normal" fo:font-weight="normal" style:font-size-asian="9pt" style:font-style-asian="normal" style:font-weight-asian="normal"/>
    </style:style>
    <style:style style:name="T3" style:family="text">
      <style:text-properties fo:color="#bcbec4" loext:opacity="100%" fo:font-family="'JetBrains Mono'" style:font-family-generic="roman" style:font-pitch="variable" fo:font-size="9pt" fo:font-style="normal" fo:font-weight="normal" style:font-size-asian="9pt" style:font-style-asian="normal" style:font-weight-asian="normal"/>
    </style:style>
    <style:style style:name="T4" style:family="text">
      <style:text-properties fo:color="#aa4926" loext:opacity="100%" fo:font-family="'JetBrains Mono'" style:font-family-generic="roman" style:font-pitch="variable" fo:font-size="9pt" fo:font-style="normal" fo:font-weight="normal" style:font-size-asian="9pt" style:font-style-asian="normal" style:font-weight-asian="normal"/>
    </style:style>
    <style:style style:name="T5" style:family="text">
      <style:text-properties fo:color="#6aab73" loext:opacity="100%" fo:font-family="'JetBrains Mono'" style:font-family-generic="roman" style:font-pitch="variable" fo:font-size="9pt" fo:font-style="normal" fo:font-weight="normal" style:font-size-asian="9pt" style:font-style-asian="normal" style:font-weight-asian="normal"/>
    </style:style>
    <style:style style:name="T6" style:family="text">
      <style:text-properties fo:color="#6aab73" loext:opacity="100%" fo:font-family="'Courier New'" style:font-family-generic="roman" style:font-pitch="variable" fo:font-size="9pt" fo:font-style="normal" fo:font-weight="normal" style:font-size-asian="9pt" style:font-style-asian="normal" style:font-weight-asian="normal"/>
    </style:style>
    <style:style style:name="T7" style:family="text">
      <style:text-properties fo:color="#2aacb8" loext:opacity="100%" fo:font-family="'JetBrains Mono'" style:font-family-generic="roman" style:font-pitch="variable" fo:font-size="9pt" fo:font-style="normal" fo:font-weight="normal" style:font-size-asian="9pt" style:font-style-asian="normal" style:font-weight-asian="normal"/>
    </style:style>
    <style:style style:name="T8" style:family="text">
      <style:text-properties fo:color="#7a7e85" loext:opacity="100%" fo:font-family="'JetBrains Mono'" style:font-family-generic="roman" style:font-pitch="variable" fo:font-size="9pt" fo:font-style="normal" fo:font-weight="normal" style:font-size-asian="9pt" style:font-style-asian="normal" style:font-weight-asian="normal"/>
    </style:style>
    <style:style style:name="T9" style:family="text">
      <style:text-properties fo:color="#56a8f5" loext:opacity="100%" fo:font-family="'JetBrains Mono'" style:font-family-generic="roman" style:font-pitch="variable" fo:font-size="9pt" fo:font-style="normal" fo:font-weight="normal" style:font-size-asian="9pt" style:font-style-asian="normal" style:font-weight-asian="normal"/>
    </style:style>
    <style:style style:name="T10" style:family="text">
      <style:text-properties fo:color="#8888c6" loext:opacity="100%" fo:font-family="'JetBrains Mono'" style:font-family-generic="roman" style:font-pitch="variable" fo:font-size="9pt" fo:font-style="normal" fo:font-weight="normal" style:font-size-asian="9pt" style:font-style-asian="normal" style:font-weight-asian="normal"/>
    </style:style>
    <style:style style:name="T11" style:family="text">
      <style:text-properties fo:color="#5f826b" loext:opacity="100%" fo:font-family="'JetBrains Mono'" style:font-family-generic="roman" style:font-pitch="variable" fo:font-size="9pt" fo:font-style="italic" fo:font-weight="normal" style:font-size-asian="9pt" style:font-style-asian="italic" style:font-weight-asian="normal"/>
    </style:style>
    <style:style style:name="T12" style:family="text">
      <style:text-properties fo:color="#b3ae60" loext:opacity="100%" fo:font-family="'JetBrains Mono'" style:font-family-generic="roman" style:font-pitch="variable" fo:font-size="9pt" fo:font-style="normal" fo:font-weight="normal" style:font-size-asian="9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a Streamlit app deployed on Streamlit Community Cloud with Supabase as the auth and data backend. I need help diagnosing and fixing two categories of problems: session persistence and page performance.<text:line-break/><text:line-break/>---<text:line-break/>PROBLEM 1: Users get logged out constantly<text:line-break/><text:line-break/>Users are logged out after short periods of inactivity — almost every time they return to the page, even with a long-lived cookie. The goal is: once logged in on a device, stay logged in indefinitely on that device. Logging in on a second device should not affect the first device's session.<text:line-break/><text:line-break/>My current implementation uses Supabase Auth (email/password). On login I store the Supabase refresh token in a browser cookie via components.html JavaScript. On every page load I read the cookie back via st.context.cookies and call auth.refresh_session() to restore the session. Here is the relevant code:<text:line-break/><text:line-break/><text:span text:style-name="T1">app.py:<text:line-break/></text:span><text:span text:style-name="T2">import </text:span><text:span text:style-name="T3">json<text:line-break/></text:span><text:span text:style-name="T2">import </text:span><text:span text:style-name="T3">streamlit </text:span><text:span text:style-name="T2">as </text:span><text:span text:style-name="T3">st<text:line-break/></text:span><text:span text:style-name="T2">import </text:span><text:span text:style-name="T3">streamlit.components.v1 </text:span><text:span text:style-name="T2">as </text:span><text:span text:style-name="T3">components<text:line-break/><text:line-break/>st.set_page_config(<text:line-break/> <text:s text:c="3"/></text:span><text:span text:style-name="T4">page_title</text:span><text:span text:style-name="T3">=</text:span><text:span text:style-name="T5">"Numberball"</text:span><text:span text:style-name="T3">,<text:line-break/> <text:s text:c="3"/></text:span><text:span text:style-name="T4">page_icon</text:span><text:span text:style-name="T3">=</text:span><text:span text:style-name="T5">"</text:span><text:span text:style-name="T6">⚾</text:span><text:span text:style-name="T5">"</text:span><text:span text:style-name="T3">,<text:line-break/> <text:s text:c="3"/></text:span><text:span text:style-name="T4">layout</text:span><text:span text:style-name="T3">=</text:span><text:span text:style-name="T5">"centered"</text:span><text:span text:style-name="T3">,<text:line-break/> <text:s text:c="3"/></text:span><text:span text:style-name="T4">initial_sidebar_state</text:span><text:span text:style-name="T3">=</text:span><text:span text:style-name="T5">"collapsed"</text:span><text:span text:style-name="T3">,<text:line-break/>)<text:line-break/><text:line-break/>st.markdown(<text:line-break/> <text:s text:c="3"/></text:span><text:span text:style-name="T5">"&lt;style&gt;"<text:line-break/> <text:s text:c="3"/>"[data-testid='stToolbarActions']{display:none !important;}"<text:line-break/> <text:s text:c="3"/>"[data-testid='stStatusWidget']{display:none !important;}"<text:line-break/> <text:s text:c="3"/>"&lt;/style&gt;"</text:span><text:span text:style-name="T3">,<text:line-break/> <text:s text:c="3"/></text:span><text:span text:style-name="T4">unsafe_allow_html</text:span><text:span text:style-name="T3">=</text:span><text:span text:style-name="T2">True</text:span><text:span text:style-name="T3">,<text:line-break/>)<text:line-break/><text:line-break/>components.html(<text:line-break/> <text:s text:c="3"/></text:span><text:span text:style-name="T5">"""&lt;script&gt;<text:line-break/>(function () {<text:line-break/> <text:s text:c="3"/>var p = window.parent;<text:line-break/> <text:s text:c="3"/>if (p._nbOverlayReady) return;<text:line-break/> <text:s text:c="3"/>p._nbOverlayReady = true;<text:line-break/> <text:s text:c="3"/>var doc = p.document;<text:line-break/> <text:s text:c="3"/>var css = doc.createElement('style');<text:line-break/> <text:s text:c="3"/>css.textContent =<text:line-break/> <text:s text:c="7"/>'#nb-overlay{display:none;position:fixed;inset:0;z-index:999999;' +<text:line-break/> <text:s text:c="7"/>'background:rgba(14,17,23,0.55);backdrop-filter:blur(3px);' +<text:line-break/> <text:s text:c="7"/>'-webkit-backdrop-filter:blur(3px);flex-direction:column;' +<text:line-break/> <text:s text:c="7"/>'align-items:center;justify-content:center;gap:16px}' +<text:line-break/> <text:s text:c="7"/>'#nb-overlay.show{display:flex}' +<text:line-break/> <text:s text:c="7"/>'#nb-ring{width:44px;height:44px;border-radius:50%;' +<text:line-break/> <text:s text:c="7"/>'border:3px solid rgba(255,255,255,0.12);border-top-color:#085d05;' +<text:line-break/> <text:s text:c="7"/>'animation:nb-spin 0.8s linear infinite}' +<text:line-break/> <text:s text:c="7"/>'@keyframes nb-spin{to{transform:rotate(360deg)}}' +<text:line-break/> <text:s text:c="7"/>'#nb-lbl{color:rgba(255,255,255,0.65);' +<text:line-break/> <text:s text:c="7"/>'font:13px/1 -apple-system,sans-serif;letter-spacing:0.06em}';<text:line-break/> <text:s text:c="3"/>doc.head.appendChild(css);<text:line-break/> <text:s text:c="3"/>var el = doc.createElement('div');<text:line-break/> <text:s text:c="3"/>el.id = 'nb-overlay';<text:line-break/></text:span><text:soft-page-break/><text:span text:style-name="T5"> <text:s text:c="3"/>el.innerHTML = '&lt;div id="nb-ring"&gt;&lt;/div&gt;&lt;div id="nb-lbl"&gt;Loading…&lt;/div&gt;';<text:line-break/> <text:s text:c="3"/>doc.body.appendChild(el);<text:line-break/> <text:s text:c="3"/>var _showTimer = null;<text:line-break/> <text:s text:c="3"/>function refresh() {<text:line-break/> <text:s text:c="7"/>var w = doc.querySelector('[data-testid="stStatusWidget"]');<text:line-break/> <text:s text:c="7"/>var active = !!(w &amp;&amp; w.textContent.trim());<text:line-break/> <text:s text:c="7"/>if (active) {<text:line-break/> <text:s text:c="11"/>if (!_showTimer) {<text:line-break/> <text:s text:c="15"/>_showTimer = setTimeout(function() { el.classList.add('show'); }, 400);<text:line-break/> <text:s text:c="11"/>}<text:line-break/> <text:s text:c="7"/>} else {<text:line-break/> <text:s text:c="11"/>clearTimeout(_showTimer);<text:line-break/> <text:s text:c="11"/>_showTimer = null;<text:line-break/> <text:s text:c="11"/>el.classList.remove('show');<text:line-break/> <text:s text:c="7"/>}<text:line-break/> <text:s text:c="3"/>}<text:line-break/> <text:s text:c="3"/>new p.MutationObserver(refresh).observe(doc.body,<text:line-break/> <text:s text:c="7"/>{childList: true, subtree: true, characterData: true});<text:line-break/> <text:s text:c="3"/>refresh();<text:line-break/>}());<text:line-break/>&lt;/script&gt;"""</text:span><text:span text:style-name="T3">,<text:line-break/> <text:s text:c="3"/></text:span><text:span text:style-name="T4">height</text:span><text:span text:style-name="T3">=</text:span><text:span text:style-name="T7">0</text:span><text:span text:style-name="T3">,<text:line-break/>)<text:line-break/><text:line-break/></text:span><text:span text:style-name="T2">import </text:span><text:span text:style-name="T3">auth<text:line-break/></text:span><text:span text:style-name="T2">import </text:span><text:span text:style-name="T3">database </text:span><text:span text:style-name="T2">as </text:span><text:span text:style-name="T3">db<text:line-break/><text:line-break/>_COOKIE_KEY <text:s text:c="4"/>= </text:span><text:span text:style-name="T5">"nb_auth"<text:line-break/></text:span><text:span text:style-name="T3">_COOKIE_MAX_AGE = </text:span><text:span text:style-name="T7">34560000 <text:s/></text:span><text:span text:style-name="T8"># 400 days in seconds<text:line-break/><text:line-break/><text:line-break/></text:span><text:span text:style-name="T2">def </text:span><text:span text:style-name="T9">_cookie_write</text:span><text:span text:style-name="T3">(token: </text:span><text:span text:style-name="T10">str</text:span><text:span text:style-name="T3">) -&gt; </text:span><text:span text:style-name="T2">None</text:span><text:span text:style-name="T3">:<text:line-break/> <text:s text:c="3"/></text:span><text:span text:style-name="T11">"""Persist the refresh token in a long-lived browser cookie."""<text:line-break/> <text:s text:c="3"/></text:span><text:span text:style-name="T3">components.html(<text:line-break/> <text:s text:c="7"/></text:span><text:span text:style-name="T5">"&lt;script&gt;document.cookie="<text:line-break/> <text:s text:c="7"/></text:span><text:span text:style-name="T3">+ json.dumps(<text:line-break/> <text:s text:c="11"/></text:span><text:span text:style-name="T5">f"</text:span><text:span text:style-name="T2">{</text:span><text:span text:style-name="T3">_COOKIE_KEY</text:span><text:span text:style-name="T2">}</text:span><text:span text:style-name="T5">=</text:span><text:span text:style-name="T2">{</text:span><text:span text:style-name="T3">token</text:span><text:span text:style-name="T2">}</text:span><text:span text:style-name="T5">; max-age=</text:span><text:span text:style-name="T2">{</text:span><text:span text:style-name="T3">_COOKIE_MAX_AGE</text:span><text:span text:style-name="T2">}</text:span><text:span text:style-name="T5">; path=/; SameSite=Strict"<text:line-break/> <text:s text:c="7"/></text:span><text:span text:style-name="T3">)<text:line-break/> <text:s text:c="7"/>+ </text:span><text:span text:style-name="T5">";&lt;/script&gt;"</text:span><text:span text:style-name="T3">,<text:line-break/> <text:s text:c="7"/></text:span><text:span text:style-name="T4">height</text:span><text:span text:style-name="T3">=</text:span><text:span text:style-name="T7">0</text:span><text:span text:style-name="T3">,<text:line-break/> <text:s text:c="3"/>)<text:line-break/><text:line-break/><text:line-break/></text:span><text:span text:style-name="T2">def </text:span><text:span text:style-name="T9">_cookie_clear</text:span><text:span text:style-name="T3">() -&gt; </text:span><text:span text:style-name="T2">None</text:span><text:span text:style-name="T3">:<text:line-break/> <text:s text:c="3"/></text:span><text:span text:style-name="T11">"""Expire the auth cookie immediately."""<text:line-break/> <text:s text:c="3"/></text:span><text:span text:style-name="T3">components.html(<text:line-break/> <text:s text:c="7"/></text:span><text:span text:style-name="T5">"&lt;script&gt;document.cookie="<text:line-break/> <text:s text:c="7"/></text:span><text:span text:style-name="T3">+ json.dumps(</text:span><text:span text:style-name="T5">f"</text:span><text:span text:style-name="T2">{</text:span><text:span text:style-name="T3">_COOKIE_KEY</text:span><text:span text:style-name="T2">}</text:span><text:span text:style-name="T5">=; max-age=0; path=/; SameSite=Strict"</text:span><text:span text:style-name="T3">)<text:line-break/> <text:s text:c="7"/>+ </text:span><text:span text:style-name="T5">";&lt;/script&gt;"</text:span><text:span text:style-name="T3">,<text:line-break/> <text:s text:c="7"/></text:span><text:span text:style-name="T4">height</text:span><text:span text:style-name="T3">=</text:span><text:span text:style-name="T7">0</text:span><text:span text:style-name="T3">,<text:line-break/> <text:s text:c="3"/>)<text:line-break/><text:line-break/><text:line-break/></text:span><text:span text:style-name="T2">def </text:span><text:span text:style-name="T9">_load_preferences</text:span><text:span text:style-name="T3">() -&gt; </text:span><text:span text:style-name="T2">None</text:span><text:span text:style-name="T3">:<text:line-break/> <text:s text:c="3"/></text:span><text:span text:style-name="T2">if </text:span><text:span text:style-name="T5">"scouting_view" </text:span><text:span text:style-name="T2">not in </text:span><text:span text:style-name="T3">st.session_state:<text:line-break/> <text:s text:c="7"/>user_id = st.session_state.get(</text:span><text:span text:style-name="T5">"user_id"</text:span><text:span text:style-name="T3">, </text:span><text:span text:style-name="T5">""</text:span><text:span text:style-name="T3">)<text:line-break/> <text:s text:c="7"/></text:span><text:span text:style-name="T2">if </text:span><text:span text:style-name="T3">user_id:<text:line-break/> <text:s text:c="11"/></text:span><text:span text:style-name="T2">try</text:span><text:span text:style-name="T3">:<text:line-break/> <text:s text:c="15"/>prefs = db.get_user_preferences(user_id)<text:line-break/> <text:s text:c="15"/></text:span><text:span text:style-name="T2">if not </text:span><text:span text:style-name="T3">prefs:<text:line-break/> <text:s text:c="19"/>db.upsert_user_preferences(user_id, </text:span><text:span text:style-name="T5">"complex"</text:span><text:span text:style-name="T3">)<text:line-break/> <text:s text:c="15"/>st.session_state[</text:span><text:span text:style-name="T5">"scouting_view"</text:span><text:span text:style-name="T3">] = prefs.get(</text:span><text:span text:style-name="T5">"scouting_view"</text:span><text:span text:style-name="T3">, </text:span><text:span text:style-name="T5">"complex"</text:span><text:span text:style-name="T3">)<text:line-break/> <text:s text:c="15"/></text:span><text:span text:style-name="T2">if </text:span><text:span text:style-name="T3">prefs.get(</text:span><text:span text:style-name="T5">"last_sheet_url"</text:span><text:span text:style-name="T3">):<text:line-break/> <text:s text:c="19"/>st.session_state[</text:span><text:span text:style-name="T5">"pred_sheet_sel"</text:span><text:span text:style-name="T3">] = prefs[</text:span><text:span text:style-name="T5">"last_sheet_url"</text:span><text:span text:style-name="T3">]<text:line-break/> <text:s text:c="11"/></text:span><text:span text:style-name="T2">except </text:span><text:span text:style-name="T10">Exception</text:span><text:span text:style-name="T3">:<text:line-break/></text:span><text:soft-page-break/><text:span text:style-name="T3"> <text:s text:c="15"/>st.session_state[</text:span><text:span text:style-name="T5">"scouting_view"</text:span><text:span text:style-name="T3">] = </text:span><text:span text:style-name="T5">"complex"<text:line-break/><text:line-break/><text:line-break/></text:span><text:span text:style-name="T8"># ── Session restore via cookie (Python-readable on every render) ──────────────<text:line-break/></text:span><text:span text:style-name="T2">if not </text:span><text:span text:style-name="T3">st.session_state.get(</text:span><text:span text:style-name="T5">"authenticated"</text:span><text:span text:style-name="T3">):<text:line-break/> <text:s text:c="3"/>_cookie_token = st.context.cookies.get(_COOKIE_KEY, </text:span><text:span text:style-name="T5">""</text:span><text:span text:style-name="T3">)<text:line-break/> <text:s text:c="3"/></text:span><text:span text:style-name="T2">if </text:span><text:span text:style-name="T3">_cookie_token:<text:line-break/> <text:s text:c="7"/>_result = auth.refresh_session(_cookie_token)<text:line-break/> <text:s text:c="7"/></text:span><text:span text:style-name="T2">if </text:span><text:span text:style-name="T3">_result:<text:line-break/> <text:s text:c="11"/>_uid, _new_token, _email = _result<text:line-break/> <text:s text:c="11"/>st.session_state.authenticated <text:s/>= </text:span><text:span text:style-name="T2">True<text:line-break/> <text:s text:c="11"/></text:span><text:span text:style-name="T3">st.session_state.user_id <text:s text:c="7"/>= _uid<text:line-break/> <text:s text:c="11"/>st.session_state.user_email <text:s text:c="4"/>= _email<text:line-break/> <text:s text:c="11"/>st.session_state[</text:span><text:span text:style-name="T5">"_refresh_token"</text:span><text:span text:style-name="T3">] = _new_token<text:line-break/> <text:s text:c="11"/>_cookie_write(_new_token) <text:s text:c="2"/></text:span><text:span text:style-name="T8"># rotate token so the cookie stays fresh<text:line-break/><text:line-break/># ── Auth gate ─────────────────────────────────────────────────────────────────<text:line-break/></text:span><text:span text:style-name="T2">if not </text:span><text:span text:style-name="T3">st.session_state.get(</text:span><text:span text:style-name="T5">"authenticated"</text:span><text:span text:style-name="T3">):<text:line-break/> <text:s text:c="3"/>st.title(</text:span><text:span text:style-name="T5">"Numberball"</text:span><text:span text:style-name="T3">)<text:line-break/> <text:s text:c="3"/></text:span><text:span text:style-name="T2">with </text:span><text:span text:style-name="T3">st.form(</text:span><text:span text:style-name="T5">"login"</text:span><text:span text:style-name="T3">):<text:line-break/> <text:s text:c="7"/>email <text:s text:c="3"/>= st.text_input(</text:span><text:span text:style-name="T5">"Email"</text:span><text:span text:style-name="T3">)<text:line-break/> <text:s text:c="7"/>password = st.text_input(</text:span><text:span text:style-name="T5">"Password"</text:span><text:span text:style-name="T3">, </text:span><text:span text:style-name="T4">type</text:span><text:span text:style-name="T3">=</text:span><text:span text:style-name="T5">"password"</text:span><text:span text:style-name="T3">)<text:line-break/> <text:s text:c="7"/>remember = st.checkbox(</text:span><text:span text:style-name="T5">"Remember Me"</text:span><text:span text:style-name="T3">, </text:span><text:span text:style-name="T4">value</text:span><text:span text:style-name="T3">=</text:span><text:span text:style-name="T2">True</text:span><text:span text:style-name="T3">)<text:line-break/> <text:s text:c="7"/>submitted = st.form_submit_button(</text:span><text:span text:style-name="T5">"Sign In"</text:span><text:span text:style-name="T3">)<text:line-break/> <text:s text:c="3"/></text:span><text:span text:style-name="T2">if </text:span><text:span text:style-name="T3">submitted:<text:line-break/> <text:s text:c="7"/></text:span><text:span text:style-name="T2">try</text:span><text:span text:style-name="T3">:<text:line-break/> <text:s text:c="11"/>user_id, refresh_token, user_email = auth.sign_in(email, password)<text:line-break/> <text:s text:c="11"/>st.session_state.authenticated <text:s/>= </text:span><text:span text:style-name="T2">True<text:line-break/> <text:s text:c="11"/></text:span><text:span text:style-name="T3">st.session_state.user_id <text:s text:c="7"/>= user_id<text:line-break/> <text:s text:c="11"/>st.session_state.user_email <text:s text:c="4"/>= user_email<text:line-break/> <text:s text:c="11"/>st.session_state[</text:span><text:span text:style-name="T5">"_refresh_token"</text:span><text:span text:style-name="T3">] = refresh_token<text:line-break/> <text:s text:c="11"/></text:span><text:span text:style-name="T2">if </text:span><text:span text:style-name="T3">remember:<text:line-break/> <text:s text:c="15"/>_cookie_write(refresh_token)<text:line-break/> <text:s text:c="11"/>st.rerun()<text:line-break/> <text:s text:c="7"/></text:span><text:span text:style-name="T2">except </text:span><text:span text:style-name="T10">Exception</text:span><text:span text:style-name="T3">:<text:line-break/> <text:s text:c="11"/>st.error(</text:span><text:span text:style-name="T5">"Invalid email or password."</text:span><text:span text:style-name="T3">)<text:line-break/> <text:s text:c="3"/>st.stop()<text:line-break/><text:line-break/>_load_preferences()<text:line-break/><text:line-break/></text:span><text:span text:style-name="T2">with </text:span><text:span text:style-name="T3">st.sidebar:<text:line-break/> <text:s text:c="3"/>_email = st.session_state.get(</text:span><text:span text:style-name="T5">"user_email"</text:span><text:span text:style-name="T3">, </text:span><text:span text:style-name="T5">""</text:span><text:span text:style-name="T3">)<text:line-break/> <text:s text:c="3"/>st.caption(</text:span><text:span text:style-name="T5">f"Signed in as `</text:span><text:span text:style-name="T2">{</text:span><text:span text:style-name="T3">_email</text:span><text:span text:style-name="T2">}</text:span><text:span text:style-name="T5">`"</text:span><text:span text:style-name="T3">)<text:line-break/> <text:s text:c="3"/></text:span><text:span text:style-name="T2">if </text:span><text:span text:style-name="T3">st.button(</text:span><text:span text:style-name="T5">"Sign Out"</text:span><text:span text:style-name="T3">):<text:line-break/> <text:s text:c="7"/>_token = st.session_state.get(</text:span><text:span text:style-name="T5">"_refresh_token"</text:span><text:span text:style-name="T3">)<text:line-break/> <text:s text:c="7"/></text:span><text:span text:style-name="T2">if </text:span><text:span text:style-name="T3">_token:<text:line-break/> <text:s text:c="11"/></text:span><text:span text:style-name="T2">try</text:span><text:span text:style-name="T3">:<text:line-break/> <text:s text:c="15"/>auth.sign_out(_token)<text:line-break/> <text:s text:c="11"/></text:span><text:span text:style-name="T2">except </text:span><text:span text:style-name="T10">Exception</text:span><text:span text:style-name="T3">:<text:line-break/> <text:s text:c="15"/></text:span><text:span text:style-name="T2">pass<text:line-break/> <text:s text:c="7"/></text:span><text:span text:style-name="T3">_cookie_clear()<text:line-break/> <text:s text:c="7"/>st.session_state.clear()<text:line-break/> <text:s text:c="7"/>st.rerun()<text:line-break/><text:line-break/>pages = [<text:line-break/> <text:s text:c="3"/>st.Page(</text:span><text:span text:style-name="T5">"pages/2_Scouting.py"</text:span><text:span text:style-name="T3">, </text:span><text:span text:style-name="T4">title</text:span><text:span text:style-name="T3">=</text:span><text:span text:style-name="T5">"Scouting"</text:span><text:span text:style-name="T3">, </text:span><text:span text:style-name="T4">icon</text:span><text:span text:style-name="T3">=</text:span><text:span text:style-name="T5">"</text:span><text:span text:style-name="T6">⚾</text:span><text:span text:style-name="T5">"</text:span><text:span text:style-name="T3">),<text:line-break/> <text:s text:c="3"/>st.Page(</text:span><text:span text:style-name="T5">"pages/1_Games.py"</text:span><text:span text:style-name="T3">, </text:span><text:span text:style-name="T4">title</text:span><text:span text:style-name="T3">=</text:span><text:span text:style-name="T5">"Sync Data"</text:span><text:span text:style-name="T3">, </text:span><text:span text:style-name="T4">icon</text:span><text:span text:style-name="T3">=</text:span><text:span text:style-name="T5">"</text:span><text:span text:style-name="T6">🔄</text:span><text:span text:style-name="T5">"</text:span><text:span text:style-name="T3">),<text:line-break/>]<text:line-break/>pg = st.navigation(pages)<text:line-break/>pg.run()<text:line-break/></text:span></text:p>
      <text:p text:style-name="P1"><text:span text:style-name="T1">auth.py:</text:span></text:p>
      <text:p text:style-name="P2" loext:marker-style-name="T2"><text:span text:style-name="T11">"""Supabase Auth helpers - creates a fresh client per call to avoid shared session state."""<text:line-break/></text:span><text:span text:style-name="T2">from </text:span><text:span text:style-name="T3">__future__ </text:span><text:span text:style-name="T2">import </text:span><text:span text:style-name="T3">annotations<text:line-break/></text:span><text:soft-page-break/><text:span text:style-name="T2">import </text:span><text:span text:style-name="T3">os<text:line-break/></text:span><text:span text:style-name="T2">import </text:span><text:span text:style-name="T3">streamlit </text:span><text:span text:style-name="T2">as </text:span><text:span text:style-name="T3">st<text:line-break/></text:span><text:span text:style-name="T2">from </text:span><text:span text:style-name="T3">supabase </text:span><text:span text:style-name="T2">import </text:span><text:span text:style-name="T3">create_client<text:line-break/><text:line-break/><text:line-break/></text:span><text:span text:style-name="T2">def </text:span><text:span text:style-name="T9">_make_client</text:span><text:span text:style-name="T3">():<text:line-break/> <text:s text:c="3"/>url = key = </text:span><text:span text:style-name="T5">""<text:line-break/> <text:s text:c="3"/></text:span><text:span text:style-name="T2">try</text:span><text:span text:style-name="T3">:<text:line-break/> <text:s text:c="7"/>url = st.secrets.get(</text:span><text:span text:style-name="T5">"supabase_url"</text:span><text:span text:style-name="T3">, </text:span><text:span text:style-name="T5">""</text:span><text:span text:style-name="T3">)<text:line-break/> <text:s text:c="7"/>key = st.secrets.get(</text:span><text:span text:style-name="T5">"supabase_key"</text:span><text:span text:style-name="T3">, </text:span><text:span text:style-name="T5">""</text:span><text:span text:style-name="T3">)<text:line-break/> <text:s text:c="3"/></text:span><text:span text:style-name="T2">except </text:span><text:span text:style-name="T10">Exception</text:span><text:span text:style-name="T3">:<text:line-break/> <text:s text:c="7"/></text:span><text:span text:style-name="T2">pass<text:line-break/> <text:s text:c="3"/></text:span><text:span text:style-name="T3">url = url </text:span><text:span text:style-name="T2">or </text:span><text:span text:style-name="T3">os.environ.get(</text:span><text:span text:style-name="T5">"SUPABASE_URL"</text:span><text:span text:style-name="T3">, </text:span><text:span text:style-name="T5">""</text:span><text:span text:style-name="T3">)<text:line-break/> <text:s text:c="3"/>key = key </text:span><text:span text:style-name="T2">or </text:span><text:span text:style-name="T3">os.environ.get(</text:span><text:span text:style-name="T5">"SUPABASE_KEY"</text:span><text:span text:style-name="T3">, </text:span><text:span text:style-name="T5">""</text:span><text:span text:style-name="T3">)<text:line-break/> <text:s text:c="3"/></text:span><text:span text:style-name="T2">return </text:span><text:span text:style-name="T3">create_client(url, key)<text:line-break/><text:line-break/><text:line-break/></text:span><text:span text:style-name="T2">def </text:span><text:span text:style-name="T9">sign_in</text:span><text:span text:style-name="T3">(email: </text:span><text:span text:style-name="T10">str</text:span><text:span text:style-name="T3">, password: </text:span><text:span text:style-name="T10">str</text:span><text:span text:style-name="T3">) -&gt; </text:span><text:span text:style-name="T10">tuple</text:span><text:span text:style-name="T3">[</text:span><text:span text:style-name="T10">str</text:span><text:span text:style-name="T3">, </text:span><text:span text:style-name="T10">str</text:span><text:span text:style-name="T3">, </text:span><text:span text:style-name="T10">str</text:span><text:span text:style-name="T3">]:<text:line-break/> <text:s text:c="3"/></text:span><text:span text:style-name="T11">"""Return (user_id, refresh_token, email). Raises on failure."""<text:line-break/> <text:s text:c="3"/></text:span><text:span text:style-name="T3">client = _make_client()<text:line-break/> <text:s text:c="3"/>resp = client.auth.sign_in_with_password({</text:span><text:span text:style-name="T5">"email"</text:span><text:span text:style-name="T3">: email, </text:span><text:span text:style-name="T5">"password"</text:span><text:span text:style-name="T3">: password})<text:line-break/> <text:s text:c="3"/></text:span><text:span text:style-name="T2">return </text:span><text:span text:style-name="T3">resp.user.id, resp.session.refresh_token, resp.user.email<text:line-break/><text:line-break/><text:line-break/></text:span><text:span text:style-name="T2">def </text:span><text:span text:style-name="T9">refresh_session</text:span><text:span text:style-name="T3">(refresh_token: </text:span><text:span text:style-name="T10">str</text:span><text:span text:style-name="T3">) -&gt; </text:span><text:span text:style-name="T10">tuple</text:span><text:span text:style-name="T3">[</text:span><text:span text:style-name="T10">str</text:span><text:span text:style-name="T3">, </text:span><text:span text:style-name="T10">str</text:span><text:span text:style-name="T3">, </text:span><text:span text:style-name="T10">str</text:span><text:span text:style-name="T3">] | </text:span><text:span text:style-name="T2">None</text:span><text:span text:style-name="T3">:<text:line-break/> <text:s text:c="3"/></text:span><text:span text:style-name="T11">"""Return (user_id, new_refresh_token, email) or None if token is invalid/expired."""<text:line-break/> <text:s text:c="3"/></text:span><text:span text:style-name="T2">try</text:span><text:span text:style-name="T3">:<text:line-break/> <text:s text:c="7"/>client = _make_client()<text:line-break/> <text:s text:c="7"/>resp = client.auth.refresh_session(refresh_token)<text:line-break/> <text:s text:c="7"/></text:span><text:span text:style-name="T2">if not </text:span><text:span text:style-name="T3">resp.session:<text:line-break/> <text:s text:c="11"/></text:span><text:span text:style-name="T2">return None<text:line-break/> <text:s text:c="7"/>return </text:span><text:span text:style-name="T3">resp.user.id, resp.session.refresh_token, resp.user.email<text:line-break/> <text:s text:c="3"/></text:span><text:span text:style-name="T2">except </text:span><text:span text:style-name="T10">Exception</text:span><text:span text:style-name="T3">:<text:line-break/> <text:s text:c="7"/></text:span><text:span text:style-name="T2">return None<text:line-break/><text:line-break/><text:line-break/>def </text:span><text:span text:style-name="T9">sign_out</text:span><text:span text:style-name="T3">(refresh_token: </text:span><text:span text:style-name="T10">str</text:span><text:span text:style-name="T3">) -&gt; </text:span><text:span text:style-name="T2">None</text:span><text:span text:style-name="T3">:<text:line-break/> <text:s text:c="3"/></text:span><text:span text:style-name="T11">"""Revoke the refresh token server-side so it can't be reused."""<text:line-break/> <text:s text:c="3"/></text:span><text:span text:style-name="T2">try</text:span><text:span text:style-name="T3">:<text:line-break/> <text:s text:c="7"/>client = _make_client()<text:line-break/> <text:s text:c="7"/>resp = client.auth.refresh_session(refresh_token)<text:line-break/> <text:s text:c="7"/></text:span><text:span text:style-name="T2">if </text:span><text:span text:style-name="T3">resp.session:<text:line-break/> <text:s text:c="11"/>client.auth.sign_out()<text:line-break/> <text:s text:c="3"/></text:span><text:span text:style-name="T2">except </text:span><text:span text:style-name="T10">Exception</text:span><text:span text:style-name="T3">:<text:line-break/> <text:s text:c="7"/></text:span><text:span text:style-name="T2">pass<text:line-break/></text:span></text:p>
      <text:p text:style-name="P1">Specific questions:<text:line-break/>- Why is the cookie restore failing after inactivity even with a 400-day max-age? Is this a Streamlit Community Cloud server-sleep issue, a Supabase refresh token expiry/invalidation issue, or a race condition in the Streamlit render cycle?<text:line-break/>- Is st.context.cookies reliable across server restarts, or is there a more robust way to read browser cookies in Streamlit?<text:line-break/>- Supabase refresh tokens may be single-use and rotate on each call. Is the token being written back to the cookie correctly and consistently before it becomes stale?<text:line-break/>- What is the correct pattern for indefinite session persistence in a Streamlit + Supabase Auth app?<text:line-break/><text:line-break/>---<text:line-break/>PROBLEM 2: Performance — page reloads and Sync operation<text:line-break/><text:line-break/>The app has two performance pain points:<text:line-break/><text:soft-page-break/><text:line-break/>A) Sync MLN operation (in pages/1_Games.py): This fetches datas it, upserts to Supabase, then clears @st.cache_data andtriggers a full Scouting page reload. This is the slowest operation in the app. I want to know: can the Google Sheets fetch and Supabase upsert be parallelized or batched more efficiently? Is there a smarter cache invalidation strategy that doesn't force a full page reload?<text:line-break/><text:line-break/>B) Scouting page reruns (in pages/2_Scouting.py): Streamlit reruns the full script on every widget interaction. The page fetches pitcher/batter play data<text:line-break/>from Supabase on load, then computes many derived stats and chopdown causes everything to recompute even when the underlyingdata hasn't changed. The page already uses @st.fragment in some places and @st.cache_data on some DB calls.</text:p>
      <text:p text:style-name="P1"/>
      <text:p text:style-name="P1"><text:span text:style-name="T1">Top lines of pages/2_Scouting.py:</text:span></text:p>
      <text:p text:style-name="P2" loext:marker-style-name="T3"><text:span text:style-name="T11">"""Pitcher and Batter scouting - combined page with shared matchup setup."""<text:line-break/></text:span><text:span text:style-name="T2">from </text:span><text:span text:style-name="T3">__future__ </text:span><text:span text:style-name="T2">import </text:span><text:span text:style-name="T3">annotations<text:line-break/></text:span><text:span text:style-name="T2">import </text:span><text:span text:style-name="T3">streamlit </text:span><text:span text:style-name="T2">as </text:span><text:span text:style-name="T3">st<text:line-break/></text:span><text:span text:style-name="T2">import </text:span><text:span text:style-name="T3">pandas </text:span><text:span text:style-name="T2">as </text:span><text:span text:style-name="T3">pd<text:line-break/></text:span><text:span text:style-name="T2">import </text:span><text:span text:style-name="T3">database </text:span><text:span text:style-name="T2">as </text:span><text:span text:style-name="T3">db<text:line-break/></text:span><text:span text:style-name="T2">import </text:span><text:span text:style-name="T3">utils<text:line-break/><text:line-break/>_MLN_QS_SHEET_ID = </text:span><text:span text:style-name="T5">"1NQ4l0EjwFYVdIjlYIkycYfuWw_jdZKiWsNURTcTy4AA"<text:line-break/></text:span><text:span text:style-name="T3">_MLN_QS_SEASON <text:s text:c="2"/>= </text:span><text:span text:style-name="T7">13<text:line-break/><text:line-break/></text:span><text:span text:style-name="T3">_MLN_QS_GAMES_COLS = {<text:line-break/> </text:span><text:span text:style-name="T5">"game_code"</text:span><text:span text:style-name="T3">, </text:span><text:span text:style-name="T5">"game_id_short"</text:span><text:span text:style-name="T3">, </text:span><text:span text:style-name="T5">"league"</text:span><text:span text:style-name="T3">, </text:span><text:span text:style-name="T5">"game_type"</text:span><text:span text:style-name="T3">, </text:span><text:span text:style-name="T5">"season"</text:span><text:span text:style-name="T3">, </text:span><text:span text:style-name="T5">"session_number"</text:span><text:span text:style-name="T3">,<text:line-break/> </text:span><text:span text:style-name="T5">"away_team"</text:span><text:span text:style-name="T3">, </text:span><text:span text:style-name="T5">"home_team"</text:span><text:span text:style-name="T3">,<text:line-break/> </text:span><text:span text:style-name="T5">"away_score"</text:span><text:span text:style-name="T3">, </text:span><text:span text:style-name="T5">"home_score"</text:span><text:span text:style-name="T3">, </text:span><text:span text:style-name="T5">"win_team"</text:span><text:span text:style-name="T3">, </text:span><text:span text:style-name="T5">"loss_team"</text:span><text:span text:style-name="T3">,<text:line-break/> </text:span><text:span text:style-name="T5">"umpire"</text:span><text:span text:style-name="T3">,<text:line-break/> </text:span><text:span text:style-name="T5">"winning_pitcher"</text:span><text:span text:style-name="T3">, </text:span><text:span text:style-name="T5">"losing_pitcher"</text:span><text:span text:style-name="T3">, </text:span><text:span text:style-name="T5">"save_pitcher"</text:span><text:span text:style-name="T3">,<text:line-break/> </text:span><text:span text:style-name="T5">"hold_1"</text:span><text:span text:style-name="T3">, </text:span><text:span text:style-name="T5">"hold_2"</text:span><text:span text:style-name="T3">,<text:line-break/> </text:span><text:span text:style-name="T5">"player_of_game"</text:span><text:span text:style-name="T3">,<text:line-break/> </text:span><text:span text:style-name="T5">"honorable_mention_1"</text:span><text:span text:style-name="T3">, </text:span><text:span text:style-name="T5">"honorable_mention_2"</text:span><text:span text:style-name="T3">, </text:span><text:span text:style-name="T5">"honorable_mention_3"</text:span><text:span text:style-name="T3">,<text:line-break/> </text:span><text:span text:style-name="T5">"start_time"</text:span><text:span text:style-name="T3">, </text:span><text:span text:style-name="T5">"end_time"</text:span><text:span text:style-name="T3">,<text:line-break/> </text:span><text:span text:style-name="T5">"last_play"</text:span><text:span text:style-name="T3">, </text:span><text:span text:style-name="T5">"last_inning"</text:span><text:span text:style-name="T3">, </text:span><text:span text:style-name="T5">"last_result"</text:span><text:span text:style-name="T3">,<text:line-break/> </text:span><text:span text:style-name="T5">"division"</text:span><text:span text:style-name="T3">, </text:span><text:span text:style-name="T5">"archive_sheet_id"</text:span><text:span text:style-name="T3">,<text:line-break/> </text:span><text:span text:style-name="T5">"sheet_url"</text:span><text:span text:style-name="T3">, </text:span><text:span text:style-name="T5">"link"</text:span><text:span text:style-name="T3">,<text:line-break/>}<text:line-break/><text:line-break/><text:line-break/></text:span><text:span text:style-name="T2">def </text:span><text:span text:style-name="T9">_qs_mln_games</text:span><text:span text:style-name="T3">() -&gt; </text:span><text:span text:style-name="T10">tuple</text:span><text:span text:style-name="T3">[</text:span><text:span text:style-name="T10">int</text:span><text:span text:style-name="T3">, </text:span><text:span text:style-name="T10">list</text:span><text:span text:style-name="T3">[</text:span><text:span text:style-name="T10">str</text:span><text:span text:style-name="T3">]]:<text:line-break/> games = utils.read_mln_games_from_sheet(_MLN_QS_SHEET_ID)<text:line-break/> </text:span><text:span text:style-name="T2">if not </text:span><text:span text:style-name="T3">games:<text:line-break/> </text:span><text:span text:style-name="T2">return </text:span><text:span text:style-name="T7">0</text:span><text:span text:style-name="T3">, [</text:span><text:span text:style-name="T5">"No games found in the MLN Games tab."</text:span><text:span text:style-name="T3">]<text:line-break/> abbrev_to_full = utils.read_mln_team_abbrev_lookup(_MLN_QS_SHEET_ID)<text:line-break/> </text:span><text:span text:style-name="T2">for </text:span><text:span text:style-name="T3">g </text:span><text:span text:style-name="T2">in </text:span><text:span text:style-name="T3">games:<text:line-break/> g[</text:span><text:span text:style-name="T5">"away_team"</text:span><text:span text:style-name="T3">] = abbrev_to_full.get(g[</text:span><text:span text:style-name="T5">"away_team"</text:span><text:span text:style-name="T3">], g[</text:span><text:span text:style-name="T5">"away_team"</text:span><text:span text:style-name="T3">])<text:line-break/> g[</text:span><text:span text:style-name="T5">"home_team"</text:span><text:span text:style-name="T3">] = abbrev_to_full.get(g[</text:span><text:span text:style-name="T5">"home_team"</text:span><text:span text:style-name="T3">], g[</text:span><text:span text:style-name="T5">"home_team"</text:span><text:span text:style-name="T3">])<text:line-break/> a_scr, h_scr = g.get(</text:span><text:span text:style-name="T5">"away_score"</text:span><text:span text:style-name="T3">), g.get(</text:span><text:span text:style-name="T5">"home_score"</text:span><text:span text:style-name="T3">)<text:line-break/> </text:span><text:span text:style-name="T2">if </text:span><text:span text:style-name="T3">a_scr </text:span><text:span text:style-name="T2">is not None and </text:span><text:span text:style-name="T3">h_scr </text:span><text:span text:style-name="T2">is not None</text:span><text:span text:style-name="T3">:<text:line-break/> </text:span><text:span text:style-name="T2">if </text:span><text:span text:style-name="T3">a_scr &gt; h_scr:<text:line-break/> g[</text:span><text:span text:style-name="T5">"win_team"</text:span><text:span text:style-name="T3">], g[</text:span><text:span text:style-name="T5">"loss_team"</text:span><text:span text:style-name="T3">] = g[</text:span><text:span text:style-name="T5">"away_team"</text:span><text:span text:style-name="T3">], g[</text:span><text:span text:style-name="T5">"home_team"</text:span><text:span text:style-name="T3">]<text:line-break/> </text:span><text:span text:style-name="T2">elif </text:span><text:span text:style-name="T3">h_scr &gt; a_scr:<text:line-break/> g[</text:span><text:span text:style-name="T5">"win_team"</text:span><text:span text:style-name="T3">], g[</text:span><text:span text:style-name="T5">"loss_team"</text:span><text:span text:style-name="T3">] = g[</text:span><text:span text:style-name="T5">"home_team"</text:span><text:span text:style-name="T3">], g[</text:span><text:span text:style-name="T5">"away_team"</text:span><text:span text:style-name="T3">]<text:line-break/> g[</text:span><text:span text:style-name="T5">"archive_sheet_id"</text:span><text:span text:style-name="T3">] = _MLN_QS_SHEET_ID<text:line-break/> g[</text:span><text:span text:style-name="T5">"game_type"</text:span><text:span text:style-name="T3">] = </text:span><text:span text:style-name="T5">"live"<text:line-break/> </text:span><text:span text:style-name="T3">games = [{k: v </text:span><text:span text:style-name="T2">for </text:span><text:span text:style-name="T3">k, v </text:span><text:span text:style-name="T2">in </text:span><text:span text:style-name="T3">g.items() </text:span><text:span text:style-name="T2">if </text:span><text:span text:style-name="T3">k </text:span><text:span text:style-name="T2">in </text:span><text:span text:style-name="T3">_MLN_QS_GAMES_COLS} </text:span><text:span text:style-name="T2">for </text:span><text:span text:style-name="T3">g </text:span><text:span text:style-name="T2">in </text:span><text:span text:style-name="T3">games]<text:line-break/> </text:span><text:span text:style-name="T2">try</text:span><text:span text:style-name="T3">:<text:line-break/> n = db.bulk_upsert_games(games)<text:line-break/> </text:span><text:span text:style-name="T2">return </text:span><text:span text:style-name="T3">n, []<text:line-break/> </text:span><text:span text:style-name="T2">except </text:span><text:span text:style-name="T10">Exception </text:span><text:span text:style-name="T2">as </text:span><text:span text:style-name="T3">e:<text:line-break/> </text:span><text:span text:style-name="T2">return </text:span><text:span text:style-name="T7">0</text:span><text:span text:style-name="T3">, [</text:span><text:span text:style-name="T10">str</text:span><text:span text:style-name="T3">(e)]<text:line-break/></text:span><text:soft-page-break/><text:span text:style-name="T3"><text:line-break/><text:line-break/></text:span><text:span text:style-name="T2">def </text:span><text:span text:style-name="T9">_qs_mln_plays</text:span><text:span text:style-name="T3">() -&gt; </text:span><text:span text:style-name="T10">tuple</text:span><text:span text:style-name="T3">[</text:span><text:span text:style-name="T10">int</text:span><text:span text:style-name="T3">, </text:span><text:span text:style-name="T10">list</text:span><text:span text:style-name="T3">[</text:span><text:span text:style-name="T10">str</text:span><text:span text:style-name="T3">]]:<text:line-break/> <text:s text:c="3"/>plays = utils.read_mln_plays_from_sheet(_MLN_QS_SHEET_ID, </text:span><text:span text:style-name="T4">tab</text:span><text:span text:style-name="T3">=</text:span><text:span text:style-name="T5">"Plays (Raw)"</text:span><text:span text:style-name="T3">)<text:line-break/> <text:s text:c="3"/></text:span><text:span text:style-name="T2">if not </text:span><text:span text:style-name="T3">plays:<text:line-break/> <text:s text:c="7"/></text:span><text:span text:style-name="T2">return </text:span><text:span text:style-name="T7">0</text:span><text:span text:style-name="T3">, [</text:span><text:span text:style-name="T5">"No plays found in the MLN Plays (Raw) tab."</text:span><text:span text:style-name="T3">]<text:line-break/><text:line-break/> <text:s text:c="3"/>all_games = db.get_games()<text:line-break/> <text:s text:c="3"/>game_code_to_id = {</text:span><text:span text:style-name="T10">str</text:span><text:span text:style-name="T3">(g[</text:span><text:span text:style-name="T5">"game_code"</text:span><text:span text:style-name="T3">]).strip(): g[</text:span><text:span text:style-name="T5">"id"</text:span><text:span text:style-name="T3">] </text:span><text:span text:style-name="T2">for </text:span><text:span text:style-name="T3">g </text:span><text:span text:style-name="T2">in </text:span><text:span text:style-name="T3">all_games </text:span><text:span text:style-name="T2">if </text:span><text:span text:style-name="T3">g.get(</text:span><text:span text:style-name="T5">"game_code"</text:span><text:span text:style-name="T3">) </text:span><text:span text:style-name="T2">and </text:span><text:span text:style-name="T3">g.get(</text:span><text:span text:style-name="T5">"id"</text:span><text:span text:style-name="T3">)}<text:line-break/> <text:s text:c="3"/>mln_game_codes_in_db = </text:span><text:span text:style-name="T10">sorted</text:span><text:span text:style-name="T3">(<text:line-break/> <text:s text:c="7"/></text:span><text:span text:style-name="T10">str</text:span><text:span text:style-name="T3">(g[</text:span><text:span text:style-name="T5">"game_code"</text:span><text:span text:style-name="T3">]).strip() </text:span><text:span text:style-name="T2">for </text:span><text:span text:style-name="T3">g </text:span><text:span text:style-name="T2">in </text:span><text:span text:style-name="T3">all_games </text:span><text:span text:style-name="T2">if </text:span><text:span text:style-name="T3">g.get(</text:span><text:span text:style-name="T5">"league"</text:span><text:span text:style-name="T3">) == </text:span><text:span text:style-name="T5">"MLN" </text:span><text:span text:style-name="T2">and </text:span><text:span text:style-name="T3">g.get(</text:span><text:span text:style-name="T5">"game_code"</text:span><text:span text:style-name="T3">)<text:line-break/> <text:s text:c="3"/>)<text:line-break/> <text:s text:c="3"/>play_game_codes = </text:span><text:span text:style-name="T10">sorted</text:span><text:span text:style-name="T3">({p[</text:span><text:span text:style-name="T5">"game_code"</text:span><text:span text:style-name="T3">] </text:span><text:span text:style-name="T2">for </text:span><text:span text:style-name="T3">p </text:span><text:span text:style-name="T2">in </text:span><text:span text:style-name="T3">plays})<text:line-break/> <text:s text:c="3"/></text:span><text:span text:style-name="T2">if not </text:span><text:span text:style-name="T3">mln_game_codes_in_db:<text:line-break/> <text:s text:c="7"/></text:span><text:span text:style-name="T2">return </text:span><text:span text:style-name="T7">0</text:span><text:span text:style-name="T3">, [<text:line-break/> <text:s text:c="11"/></text:span><text:span text:style-name="T5">f"No MLN games found in database - sync MLN Games first. "<text:line-break/> <text:s text:c="11"/>f"Plays expect game codes like: </text:span><text:span text:style-name="T2">{</text:span><text:span text:style-name="T3">play_game_codes[:</text:span><text:span text:style-name="T7">5</text:span><text:span text:style-name="T3">]</text:span><text:span text:style-name="T2">}</text:span><text:span text:style-name="T5">"<text:line-break/> <text:s text:c="7"/></text:span><text:span text:style-name="T3">]<text:line-break/> <text:s text:c="3"/>missing = </text:span><text:span text:style-name="T10">sorted</text:span><text:span text:style-name="T3">(</text:span><text:span text:style-name="T10">set</text:span><text:span text:style-name="T3">(play_game_codes) - </text:span><text:span text:style-name="T10">set</text:span><text:span text:style-name="T3">(mln_game_codes_in_db))<text:line-break/> <text:s text:c="3"/>diag = (<text:line-break/> <text:s text:c="7"/>[<text:line-break/> <text:s text:c="11"/></text:span><text:span text:style-name="T5">f"DB has </text:span><text:span text:style-name="T2">{</text:span><text:span text:style-name="T10">len</text:span><text:span text:style-name="T3">(mln_game_codes_in_db)</text:span><text:span text:style-name="T2">}</text:span><text:span text:style-name="T5"> MLN game(s) e.g. </text:span><text:span text:style-name="T2">{</text:span><text:span text:style-name="T3">mln_game_codes_in_db[:</text:span><text:span text:style-name="T7">5</text:span><text:span text:style-name="T3">]</text:span><text:span text:style-name="T2">}</text:span><text:span text:style-name="T5">"</text:span><text:span text:style-name="T3">,<text:line-break/> <text:s text:c="11"/></text:span><text:span text:style-name="T5">f"Plays expect </text:span><text:span text:style-name="T2">{</text:span><text:span text:style-name="T10">len</text:span><text:span text:style-name="T3">(play_game_codes)</text:span><text:span text:style-name="T2">}</text:span><text:span text:style-name="T5"> game(s) e.g. </text:span><text:span text:style-name="T2">{</text:span><text:span text:style-name="T3">play_game_codes[:</text:span><text:span text:style-name="T7">5</text:span><text:span text:style-name="T3">]</text:span><text:span text:style-name="T2">}</text:span><text:span text:style-name="T5">"</text:span><text:span text:style-name="T3">,<text:line-break/> <text:s text:c="11"/></text:span><text:span text:style-name="T5">f"</text:span><text:span text:style-name="T2">{</text:span><text:span text:style-name="T10">len</text:span><text:span text:style-name="T3">(missing)</text:span><text:span text:style-name="T2">}</text:span><text:span text:style-name="T5"> game code(s) missing from DB e.g. </text:span><text:span text:style-name="T2">{</text:span><text:span text:style-name="T3">missing[:</text:span><text:span text:style-name="T7">5</text:span><text:span text:style-name="T3">]</text:span><text:span text:style-name="T2">}</text:span><text:span text:style-name="T5">"</text:span><text:span text:style-name="T3">,<text:line-break/> <text:s text:c="7"/>]<text:line-break/> <text:s text:c="7"/></text:span><text:span text:style-name="T2">if </text:span><text:span text:style-name="T3">missing<text:line-break/> <text:s text:c="7"/></text:span><text:span text:style-name="T2">else </text:span><text:span text:style-name="T3">[]<text:line-break/> <text:s text:c="3"/>)<text:line-break/><text:line-break/> <text:s text:c="3"/>mln_teams = db.get_mln_teams_for_lookup()<text:line-break/> <text:s text:c="3"/>team_id_to_full = {t[</text:span><text:span text:style-name="T5">"team_id"</text:span><text:span text:style-name="T3">]: t[</text:span><text:span text:style-name="T5">"full_team"</text:span><text:span text:style-name="T3">] </text:span><text:span text:style-name="T2">for </text:span><text:span text:style-name="T3">t </text:span><text:span text:style-name="T2">in </text:span><text:span text:style-name="T3">mln_teams </text:span><text:span text:style-name="T2">if </text:span><text:span text:style-name="T3">t.get(</text:span><text:span text:style-name="T5">"team_id"</text:span><text:span text:style-name="T3">) </text:span><text:span text:style-name="T2">and </text:span><text:span text:style-name="T3">t.get(</text:span><text:span text:style-name="T5">"full_team"</text:span><text:span text:style-name="T3">)}<text:line-break/><text:line-break/> <text:s text:c="3"/>mln_players = db.get_mln_players_for_lookup()<text:line-break/> <text:s text:c="3"/>sid_to_name = {p[</text:span><text:span text:style-name="T5">"s_id"</text:span><text:span text:style-name="T3">]: p[</text:span><text:span text:style-name="T5">"name"</text:span><text:span text:style-name="T3">] </text:span><text:span text:style-name="T2">for </text:span><text:span text:style-name="T3">p </text:span><text:span text:style-name="T2">in </text:span><text:span text:style-name="T3">mln_players </text:span><text:span text:style-name="T2">if </text:span><text:span text:style-name="T3">p.get(</text:span><text:span text:style-name="T5">"s_id"</text:span><text:span text:style-name="T3">) </text:span><text:span text:style-name="T2">and </text:span><text:span text:style-name="T3">p.get(</text:span><text:span text:style-name="T5">"name"</text:span><text:span text:style-name="T3">)}<text:line-break/><text:line-break/> <text:s text:c="3"/>plays_sorted = </text:span><text:span text:style-name="T10">sorted</text:span><text:span text:style-name="T3">(plays, </text:span><text:span text:style-name="T4">key</text:span><text:span text:style-name="T3">=</text:span><text:span text:style-name="T2">lambda </text:span><text:span text:style-name="T3">p: p[</text:span><text:span text:style-name="T5">"play_num"</text:span><text:span text:style-name="T3">])<text:line-break/> <text:s text:c="3"/>seen_inn: <text:s text:c="4"/></text:span><text:span text:style-name="T10">dict</text:span><text:span text:style-name="T3">[</text:span><text:span text:style-name="T10">str</text:span><text:span text:style-name="T3">, </text:span><text:span text:style-name="T10">set</text:span><text:span text:style-name="T3">] = {}<text:line-break/> <text:s text:c="3"/>seen_pitcher: </text:span><text:span text:style-name="T10">dict</text:span><text:span text:style-name="T3">[</text:span><text:span text:style-name="T10">str</text:span><text:span text:style-name="T3">, </text:span><text:span text:style-name="T10">set</text:span><text:span text:style-name="T3">] = {}<text:line-break/> <text:s text:c="3"/>outs_tracker: </text:span><text:span text:style-name="T10">dict</text:span><text:span text:style-name="T3">[</text:span><text:span text:style-name="T10">tuple</text:span><text:span text:style-name="T3">, </text:span><text:span text:style-name="T10">int</text:span><text:span text:style-name="T3">] = {}<text:line-break/> <text:s text:c="3"/>errors: </text:span><text:span text:style-name="T10">list</text:span><text:span text:style-name="T3">[</text:span><text:span text:style-name="T10">str</text:span><text:span text:style-name="T3">] = []<text:line-break/> <text:s text:c="3"/>rows: <text:s text:c="2"/></text:span><text:span text:style-name="T10">list</text:span><text:span text:style-name="T3">[</text:span><text:span text:style-name="T10">dict</text:span><text:span text:style-name="T3">] = []<text:line-break/><text:line-break/> <text:s text:c="3"/></text:span><text:span text:style-name="T2">for </text:span><text:span text:style-name="T3">play </text:span><text:span text:style-name="T2">in </text:span><text:span text:style-name="T3">plays_sorted:<text:line-break/> <text:s text:c="7"/>gc = play[</text:span><text:span text:style-name="T5">"game_code"</text:span><text:span text:style-name="T3">]<text:line-break/> <text:s text:c="7"/>season = _MLN_QS_SEASON </text:span><text:span text:style-name="T2">or </text:span><text:span text:style-name="T3">play.get(</text:span><text:span text:style-name="T5">"season"</text:span><text:span text:style-name="T3">) </text:span><text:span text:style-name="T2">or </text:span><text:span text:style-name="T3">(</text:span><text:span text:style-name="T10">int</text:span><text:span text:style-name="T3">(gc[:</text:span><text:span text:style-name="T7">2</text:span><text:span text:style-name="T3">]) </text:span><text:span text:style-name="T2">if </text:span><text:span text:style-name="T3">gc </text:span><text:span text:style-name="T2">and </text:span><text:span text:style-name="T10">len</text:span><text:span text:style-name="T3">(gc) &gt;= </text:span><text:span text:style-name="T7">2 </text:span><text:span text:style-name="T2">and </text:span><text:span text:style-name="T3">gc[:</text:span><text:span text:style-name="T7">2</text:span><text:span text:style-name="T3">].isdigit() </text:span><text:span text:style-name="T2">else None</text:span><text:span text:style-name="T3">)<text:line-break/> <text:s text:c="7"/>game_db_id = game_code_to_id.get(gc)<text:line-break/> <text:s text:c="7"/></text:span><text:span text:style-name="T2">if not </text:span><text:span text:style-name="T3">game_db_id:<text:line-break/> <text:s text:c="11"/>errors.append(</text:span><text:span text:style-name="T5">f"Play </text:span><text:span text:style-name="T2">{</text:span><text:span text:style-name="T3">play[</text:span><text:span text:style-name="T5">'play_num'</text:span><text:span text:style-name="T3">]</text:span><text:span text:style-name="T2">}</text:span><text:span text:style-name="T5">: game </text:span><text:span text:style-name="T2">{</text:span><text:span text:style-name="T3">gc</text:span><text:span text:style-name="T2">}</text:span><text:span text:style-name="T5"> not found - sync MLN Games first."</text:span><text:span text:style-name="T3">)<text:line-break/> <text:s text:c="11"/></text:span><text:span text:style-name="T2">continue<text:line-break/><text:line-break/> <text:s text:c="7"/>def </text:span><text:span text:style-name="T9">_sid</text:span><text:span text:style-name="T3">(pid):<text:line-break/> <text:s text:c="11"/></text:span><text:span text:style-name="T2">return </text:span><text:span text:style-name="T5">f"</text:span><text:span text:style-name="T2">{</text:span><text:span text:style-name="T3">season</text:span><text:span text:style-name="T2">}</text:span><text:span text:style-name="T5">_</text:span><text:span text:style-name="T2">{</text:span><text:span text:style-name="T3">pid</text:span><text:span text:style-name="T2">}</text:span><text:span text:style-name="T5">" </text:span><text:span text:style-name="T2">if </text:span><text:span text:style-name="T3">season </text:span><text:span text:style-name="T2">and </text:span><text:span text:style-name="T3">pid </text:span><text:span text:style-name="T2">else None<text:line-break/><text:line-break/> <text:s text:c="7"/></text:span><text:span text:style-name="T3">pitcher_sid = _sid(play.get(</text:span><text:span text:style-name="T5">"pitcher_id"</text:span><text:span text:style-name="T3">))<text:line-break/> <text:s text:c="7"/>batter_sid <text:s/>= _sid(play.get(</text:span><text:span text:style-name="T5">"batter_id"</text:span><text:span text:style-name="T3">))<text:line-break/> <text:s text:c="7"/>catcher_sid = _sid(play.get(</text:span><text:span text:style-name="T5">"catcher_id"</text:span><text:span text:style-name="T3">))<text:line-break/> <text:s text:c="7"/>runner_sid <text:s/>= _sid(play.get(</text:span><text:span text:style-name="T5">"runner_id"</text:span><text:span text:style-name="T3">))<text:line-break/><text:line-break/> <text:s text:c="7"/>pitcher_name = sid_to_name.get(pitcher_sid, </text:span><text:span text:style-name="T5">""</text:span><text:span text:style-name="T3">) </text:span><text:span text:style-name="T2">if </text:span><text:span text:style-name="T3">pitcher_sid </text:span><text:span text:style-name="T2">else </text:span><text:span text:style-name="T5">""<text:line-break/> <text:s text:c="7"/></text:span><text:span text:style-name="T3">batter_name <text:s/>= sid_to_name.get(batter_sid, <text:s/></text:span><text:span text:style-name="T5">""</text:span><text:span text:style-name="T3">) </text:span><text:span text:style-name="T2">if </text:span><text:span text:style-name="T3">batter_sid <text:s/></text:span><text:span text:style-name="T2">else </text:span><text:span text:style-name="T5">""<text:line-break/> <text:s text:c="7"/></text:span><text:span text:style-name="T3">catcher_name = sid_to_name.get(catcher_sid) <text:s text:c="4"/></text:span><text:span text:style-name="T2">if </text:span><text:span text:style-name="T3">catcher_sid </text:span><text:span text:style-name="T2">else None<text:line-break/> <text:s text:c="7"/></text:span><text:span text:style-name="T3">runner_name <text:s/>= sid_to_name.get(runner_sid) <text:s text:c="5"/></text:span><text:span text:style-name="T2">if </text:span><text:span text:style-name="T3">runner_sid <text:s/></text:span><text:span text:style-name="T2">else None<text:line-break/><text:line-break/> <text:s text:c="7"/></text:span><text:span text:style-name="T3">away_full = team_id_to_full.get(play.get(</text:span><text:span text:style-name="T5">"away"</text:span><text:span text:style-name="T3">) </text:span><text:span text:style-name="T2">or </text:span><text:span text:style-name="T5">""</text:span><text:span text:style-name="T3">, play.get(</text:span><text:span text:style-name="T5">"away"</text:span><text:span text:style-name="T3">) </text:span><text:span text:style-name="T2">or </text:span><text:span text:style-name="T5">""</text:span><text:span text:style-name="T3">)<text:line-break/> <text:s text:c="7"/>home_full = team_id_to_full.get(play.get(</text:span><text:span text:style-name="T5">"home"</text:span><text:span text:style-name="T3">) </text:span><text:span text:style-name="T2">or </text:span><text:span text:style-name="T5">""</text:span><text:span text:style-name="T3">, play.get(</text:span><text:span text:style-name="T5">"home"</text:span><text:span text:style-name="T3">) </text:span><text:span text:style-name="T2">or </text:span><text:span text:style-name="T5">""</text:span><text:span text:style-name="T3">)<text:line-break/></text:span><text:soft-page-break/><text:span text:style-name="T3"> <text:s text:c="7"/></text:span><text:span text:style-name="T2">if </text:span><text:span text:style-name="T3">play[</text:span><text:span text:style-name="T5">"half"</text:span><text:span text:style-name="T3">] == </text:span><text:span text:style-name="T5">"top"</text:span><text:span text:style-name="T3">:<text:line-break/> <text:s text:c="11"/>off_team, def_team = away_full, home_full<text:line-break/> <text:s text:c="7"/></text:span><text:span text:style-name="T2">else</text:span><text:span text:style-name="T3">:<text:line-break/> <text:s text:c="11"/>off_team, def_team = home_full, away_full<text:line-break/><text:line-break/> <text:s text:c="7"/>pitch, swing = play.get(</text:span><text:span text:style-name="T5">"pitch"</text:span><text:span text:style-name="T3">), play.get(</text:span><text:span text:style-name="T5">"swing"</text:span><text:span text:style-name="T3">)<text:line-break/> <text:s text:c="7"/>diff = utils.circular_diff(</text:span><text:span text:style-name="T10">int</text:span><text:span text:style-name="T3">(pitch), </text:span><text:span text:style-name="T10">int</text:span><text:span text:style-name="T3">(swing)) </text:span><text:span text:style-name="T2">if </text:span><text:span text:style-name="T3">pitch </text:span><text:span text:style-name="T2">is not None and </text:span><text:span text:style-name="T3">swing </text:span><text:span text:style-name="T2">is not None else None<text:line-break/><text:line-break/> <text:s text:c="7"/></text:span><text:span text:style-name="T3">inn_key = (gc, play[</text:span><text:span text:style-name="T5">"inning"</text:span><text:span text:style-name="T3">], play[</text:span><text:span text:style-name="T5">"half"</text:span><text:span text:style-name="T3">])<text:line-break/> <text:s text:c="7"/></text:span><text:span text:style-name="T2">if </text:span><text:span text:style-name="T3">inn_key </text:span><text:span text:style-name="T2">not in </text:span><text:span text:style-name="T3">outs_tracker:<text:line-break/> <text:s text:c="11"/>outs_tracker[inn_key] = </text:span><text:span text:style-name="T7">0<text:line-break/> <text:s text:c="7"/></text:span><text:span text:style-name="T3">outs = outs_tracker[inn_key]<text:line-break/> <text:s text:c="7"/>outs_tracker[inn_key] = </text:span><text:span text:style-name="T10">min</text:span><text:span text:style-name="T3">(</text:span><text:span text:style-name="T7">3</text:span><text:span text:style-name="T3">, outs + utils.outs_added(play.get(</text:span><text:span text:style-name="T5">"result"</text:span><text:span text:style-name="T3">) </text:span><text:span text:style-name="T2">or </text:span><text:span text:style-name="T5">""</text:span><text:span text:style-name="T3">))<text:line-break/><text:line-break/> <text:s text:c="7"/>fp_inn_key = (play[</text:span><text:span text:style-name="T5">"inning"</text:span><text:span text:style-name="T3">], play[</text:span><text:span text:style-name="T5">"half"</text:span><text:span text:style-name="T3">])<text:line-break/> <text:s text:c="7"/>is_fp_inn = fp_inn_key </text:span><text:span text:style-name="T2">not in </text:span><text:span text:style-name="T3">seen_inn.setdefault(gc, </text:span><text:span text:style-name="T10">set</text:span><text:span text:style-name="T3">())<text:line-break/> <text:s text:c="7"/>is_fp_app = pitcher_name </text:span><text:span text:style-name="T2">not in </text:span><text:span text:style-name="T3">seen_pitcher.setdefault(gc, </text:span><text:span text:style-name="T10">set</text:span><text:span text:style-name="T3">())<text:line-break/> <text:s text:c="7"/>seen_inn[gc].add(fp_inn_key)<text:line-break/> <text:s text:c="7"/></text:span><text:span text:style-name="T2">if </text:span><text:span text:style-name="T3">pitcher_name:<text:line-break/> <text:s text:c="11"/>seen_pitcher[gc].add(pitcher_name)<text:line-break/><text:line-break/> <text:s text:c="7"/>rows.append({<text:line-break/> <text:s text:c="11"/>**{k: v </text:span><text:span text:style-name="T2">for </text:span><text:span text:style-name="T3">k, v </text:span><text:span text:style-name="T2">in </text:span><text:span text:style-name="T3">play.items() </text:span><text:span text:style-name="T2">if </text:span><text:span text:style-name="T3">k </text:span><text:span text:style-name="T2">not in </text:span><text:span text:style-name="T3">(</text:span><text:span text:style-name="T5">"game_code"</text:span><text:span text:style-name="T3">, </text:span><text:span text:style-name="T5">"away"</text:span><text:span text:style-name="T3">, </text:span><text:span text:style-name="T5">"home"</text:span><text:span text:style-name="T3">)},<text:line-break/> <text:s text:c="11"/></text:span><text:span text:style-name="T5">"game_code"</text:span><text:span text:style-name="T3">: <text:s text:c="3"/>gc,<text:line-break/> <text:s text:c="11"/></text:span><text:span text:style-name="T5">"season"</text:span><text:span text:style-name="T3">: <text:s text:c="6"/>season,<text:line-break/> <text:s text:c="11"/></text:span><text:span text:style-name="T5">"game_type"</text:span><text:span text:style-name="T3">: <text:s text:c="3"/></text:span><text:span text:style-name="T5">"live"</text:span><text:span text:style-name="T3">,<text:line-break/> <text:s text:c="11"/></text:span><text:span text:style-name="T5">"game_id"</text:span><text:span text:style-name="T3">: <text:s text:c="5"/>game_db_id,<text:line-break/> <text:s text:c="11"/></text:span><text:span text:style-name="T5">"away"</text:span><text:span text:style-name="T3">: <text:s text:c="8"/>play.get(</text:span><text:span text:style-name="T5">"away"</text:span><text:span text:style-name="T3">),<text:line-break/> <text:s text:c="11"/></text:span><text:span text:style-name="T5">"home"</text:span><text:span text:style-name="T3">: <text:s text:c="8"/>play.get(</text:span><text:span text:style-name="T5">"home"</text:span><text:span text:style-name="T3">),<text:line-break/> <text:s text:c="11"/></text:span><text:span text:style-name="T5">"pitcher_name"</text:span><text:span text:style-name="T3">: pitcher_name,<text:line-break/> <text:s text:c="11"/></text:span><text:span text:style-name="T5">"batter_name"</text:span><text:span text:style-name="T3">: <text:s/>batter_name,<text:line-break/> <text:s text:c="11"/></text:span><text:span text:style-name="T5">"catcher_name"</text:span><text:span text:style-name="T3">: catcher_name,<text:line-break/> <text:s text:c="11"/></text:span><text:span text:style-name="T5">"runner_name"</text:span><text:span text:style-name="T3">: <text:s/>runner_name,<text:line-break/> <text:s text:c="11"/></text:span><text:span text:style-name="T5">"off_team"</text:span><text:span text:style-name="T3">: <text:s text:c="4"/>off_team,<text:line-break/> <text:s text:c="11"/></text:span><text:span text:style-name="T5">"def_team"</text:span><text:span text:style-name="T3">: <text:s text:c="4"/>def_team,<text:line-break/> <text:s text:c="11"/></text:span><text:span text:style-name="T5">"diff"</text:span><text:span text:style-name="T3">: <text:s text:c="8"/>diff,<text:line-break/> <text:s text:c="11"/></text:span><text:span text:style-name="T5">"outs"</text:span><text:span text:style-name="T3">: <text:s text:c="8"/>outs,<text:line-break/> <text:s text:c="11"/></text:span><text:span text:style-name="T5">"is_fp_inn"</text:span><text:span text:style-name="T3">: <text:s text:c="3"/>is_fp_inn,<text:line-break/> <text:s text:c="11"/></text:span><text:span text:style-name="T5">"is_fp_app"</text:span><text:span text:style-name="T3">: <text:s text:c="3"/>is_fp_app,<text:line-break/> <text:s text:c="7"/>})<text:line-break/><text:line-break/> <text:s text:c="3"/></text:span><text:span text:style-name="T2">if not </text:span><text:span text:style-name="T3">rows:<text:line-break/> <text:s text:c="7"/></text:span><text:span text:style-name="T2">return </text:span><text:span text:style-name="T7">0</text:span><text:span text:style-name="T3">, diag + errors<text:line-break/> <text:s text:c="3"/>rows = </text:span><text:span text:style-name="T10">list</text:span><text:span text:style-name="T3">({(r[</text:span><text:span text:style-name="T5">"play_num"</text:span><text:span text:style-name="T3">], r.get(</text:span><text:span text:style-name="T5">"league"</text:span><text:span text:style-name="T3">, </text:span><text:span text:style-name="T5">"MLN"</text:span><text:span text:style-name="T3">)): r </text:span><text:span text:style-name="T2">for </text:span><text:span text:style-name="T3">r </text:span><text:span text:style-name="T2">in </text:span><text:span text:style-name="T3">rows}.values())<text:line-break/> <text:s text:c="3"/></text:span><text:span text:style-name="T2">try</text:span><text:span text:style-name="T3">:<text:line-break/> <text:s text:c="7"/>n = db.bulk_upsert_mln_plays(rows)<text:line-break/> <text:s text:c="7"/></text:span><text:span text:style-name="T2">return </text:span><text:span text:style-name="T3">n, diag + errors<text:line-break/> <text:s text:c="3"/></text:span><text:span text:style-name="T2">except </text:span><text:span text:style-name="T10">Exception </text:span><text:span text:style-name="T2">as </text:span><text:span text:style-name="T3">e:<text:line-break/> <text:s text:c="7"/></text:span><text:span text:style-name="T2">return </text:span><text:span text:style-name="T7">0</text:span><text:span text:style-name="T3">, diag + errors + [</text:span><text:span text:style-name="T10">str</text:span><text:span text:style-name="T3">(e)]<text:line-break/><text:line-break/><text:line-break/></text:span><text:span text:style-name="T8"># Detect narrow viewport (mobile) for responsive hint chart layout<text:line-break/></text:span><text:span text:style-name="T3">_ua = st.context.headers.get(</text:span><text:span text:style-name="T5">"user-agent"</text:span><text:span text:style-name="T3">, </text:span><text:span text:style-name="T5">""</text:span><text:span text:style-name="T3">).lower()<text:line-break/>_is_mobile = </text:span><text:span text:style-name="T10">any</text:span><text:span text:style-name="T3">(k </text:span><text:span text:style-name="T2">in </text:span><text:span text:style-name="T3">_ua </text:span><text:span text:style-name="T2">for </text:span><text:span text:style-name="T3">k </text:span><text:span text:style-name="T2">in </text:span><text:span text:style-name="T3">(</text:span><text:span text:style-name="T5">"mobile"</text:span><text:span text:style-name="T3">, </text:span><text:span text:style-name="T5">"android"</text:span><text:span text:style-name="T3">, </text:span><text:span text:style-name="T5">"iphone"</text:span><text:span text:style-name="T3">, </text:span><text:span text:style-name="T5">"ipad"</text:span><text:span text:style-name="T3">, </text:span><text:span text:style-name="T5">"silk"</text:span><text:span text:style-name="T3">))<text:line-break/><text:line-break/>_title_col, _qs_btn_col = st.columns([</text:span><text:span text:style-name="T7">5</text:span><text:span text:style-name="T3">, </text:span><text:span text:style-name="T7">1</text:span><text:span text:style-name="T3">], </text:span><text:span text:style-name="T4">vertical_alignment</text:span><text:span text:style-name="T3">=</text:span><text:span text:style-name="T5">"bottom"</text:span><text:span text:style-name="T3">)<text:line-break/></text:span><text:span text:style-name="T2">with </text:span><text:span text:style-name="T3">_title_col:<text:line-break/> <text:s text:c="3"/>st.title(</text:span><text:span text:style-name="T5">"Scouting"</text:span><text:span text:style-name="T3">)<text:line-break/></text:span><text:span text:style-name="T2">with </text:span><text:span text:style-name="T3">_qs_btn_col:<text:line-break/> <text:s text:c="3"/></text:span><text:span text:style-name="T2">if </text:span><text:span text:style-name="T3">st.button(</text:span><text:span text:style-name="T5">"Sync MLN"</text:span><text:span text:style-name="T3">, </text:span><text:span text:style-name="T4">key</text:span><text:span text:style-name="T3">=</text:span><text:span text:style-name="T5">"qs_mln_all"</text:span><text:span text:style-name="T3">, </text:span><text:span text:style-name="T4">use_container_width</text:span><text:span text:style-name="T3">=</text:span><text:span text:style-name="T2">True</text:span><text:span text:style-name="T3">):<text:line-break/> <text:s text:c="7"/></text:span><text:span text:style-name="T2">with </text:span><text:span text:style-name="T3">st.spinner(</text:span><text:span text:style-name="T5">"Syncing MLN Games then Plays..."</text:span><text:span text:style-name="T3">):<text:line-break/> <text:s text:c="11"/>_qs_gn, _qs_gerrs = _qs_mln_games()<text:line-break/> <text:s text:c="11"/>_qs_pn, _qs_perrs = _qs_mln_plays()<text:line-break/> <text:s text:c="7"/>st.session_state[</text:span><text:span text:style-name="T5">"_sync_msg"</text:span><text:span text:style-name="T3">] = </text:span><text:span text:style-name="T5">f"MLN - Games: </text:span><text:span text:style-name="T2">{</text:span><text:span text:style-name="T3">_qs_gn</text:span><text:span text:style-name="T2">}</text:span><text:span text:style-name="T5"> · Plays: </text:span><text:span text:style-name="T2">{</text:span><text:span text:style-name="T3">_qs_pn</text:span><text:span text:style-name="T2">}</text:span><text:span text:style-name="T5">"<text:line-break/> <text:s text:c="7"/></text:span><text:span text:style-name="T3">_qs_all_errs = _qs_gerrs + _qs_perrs<text:line-break/></text:span><text:soft-page-break/><text:span text:style-name="T3"> <text:s text:c="7"/></text:span><text:span text:style-name="T2">if </text:span><text:span text:style-name="T3">_qs_all_errs:<text:line-break/> <text:s text:c="11"/>st.session_state[</text:span><text:span text:style-name="T5">"_sync_errors"</text:span><text:span text:style-name="T3">] = _qs_all_errs<text:line-break/> <text:s text:c="7"/>st.cache_data.clear()<text:line-break/> <text:s text:c="7"/>st.session_state[</text:span><text:span text:style-name="T5">"_data_v"</text:span><text:span text:style-name="T3">] = st.session_state.get(</text:span><text:span text:style-name="T5">"_data_v"</text:span><text:span text:style-name="T3">, </text:span><text:span text:style-name="T7">0</text:span><text:span text:style-name="T3">) + </text:span><text:span text:style-name="T7">1<text:line-break/> <text:s text:c="7"/></text:span><text:span text:style-name="T3">st.session_state.pop(</text:span><text:span text:style-name="T5">"_auto_fetch_done"</text:span><text:span text:style-name="T3">, </text:span><text:span text:style-name="T2">None</text:span><text:span text:style-name="T3">)<text:line-break/> <text:s text:c="7"/>st.session_state.pop(</text:span><text:span text:style-name="T5">"pred_result_ranges"</text:span><text:span text:style-name="T3">, </text:span><text:span text:style-name="T2">None</text:span><text:span text:style-name="T3">)<text:line-break/> <text:s text:c="7"/>st.rerun()<text:line-break/><text:line-break/></text:span><text:span text:style-name="T8"># Seed radio state once from DB-backed preference so index never fights the widget<text:line-break/></text:span><text:span text:style-name="T2">if </text:span><text:span text:style-name="T5">"scouting_view_radio" </text:span><text:span text:style-name="T2">not in </text:span><text:span text:style-name="T3">st.session_state:<text:line-break/> <text:s text:c="3"/>_stored = st.session_state.get(</text:span><text:span text:style-name="T5">"scouting_view"</text:span><text:span text:style-name="T3">, </text:span><text:span text:style-name="T5">"complex"</text:span><text:span text:style-name="T3">)<text:line-break/> <text:s text:c="3"/>st.session_state[</text:span><text:span text:style-name="T5">"scouting_view_radio"</text:span><text:span text:style-name="T3">] = </text:span><text:span text:style-name="T5">"Complex" </text:span><text:span text:style-name="T2">if </text:span><text:span text:style-name="T3">_stored == </text:span><text:span text:style-name="T5">"complex" </text:span><text:span text:style-name="T2">else </text:span><text:span text:style-name="T5">"Simple"<text:line-break/><text:line-break/></text:span><text:span text:style-name="T3">_view_sel = st.radio(<text:line-break/> <text:s text:c="3"/></text:span><text:span text:style-name="T5">"Scouting View"</text:span><text:span text:style-name="T3">, [</text:span><text:span text:style-name="T5">"Complex"</text:span><text:span text:style-name="T3">, </text:span><text:span text:style-name="T5">"Simple"</text:span><text:span text:style-name="T3">],<text:line-break/> <text:s text:c="3"/></text:span><text:span text:style-name="T4">horizontal</text:span><text:span text:style-name="T3">=</text:span><text:span text:style-name="T2">True</text:span><text:span text:style-name="T3">, </text:span><text:span text:style-name="T4">key</text:span><text:span text:style-name="T3">=</text:span><text:span text:style-name="T5">"scouting_view_radio"</text:span><text:span text:style-name="T3">,<text:line-break/>)<text:line-break/>_new_view = _view_sel.lower()<text:line-break/></text:span><text:span text:style-name="T2">if </text:span><text:span text:style-name="T3">_new_view != st.session_state.get(</text:span><text:span text:style-name="T5">"scouting_view"</text:span><text:span text:style-name="T3">, </text:span><text:span text:style-name="T5">"complex"</text:span><text:span text:style-name="T3">):<text:line-break/> <text:s text:c="3"/>st.session_state[</text:span><text:span text:style-name="T5">"scouting_view"</text:span><text:span text:style-name="T3">] = _new_view<text:line-break/> <text:s text:c="3"/>_uid = st.session_state.get(</text:span><text:span text:style-name="T5">"user_id"</text:span><text:span text:style-name="T3">)<text:line-break/> <text:s text:c="3"/></text:span><text:span text:style-name="T2">if </text:span><text:span text:style-name="T3">_uid:<text:line-break/> <text:s text:c="7"/></text:span><text:span text:style-name="T2">try</text:span><text:span text:style-name="T3">:<text:line-break/> <text:s text:c="11"/>db.upsert_user_preferences(_uid, _new_view)<text:line-break/> <text:s text:c="7"/></text:span><text:span text:style-name="T2">except </text:span><text:span text:style-name="T10">Exception</text:span><text:span text:style-name="T3">:<text:line-break/> <text:s text:c="11"/></text:span><text:span text:style-name="T2">pass<text:line-break/></text:span><text:span text:style-name="T3">_simple_mode = _new_view == </text:span><text:span text:style-name="T5">"simple"<text:line-break/><text:line-break/></text:span><text:span text:style-name="T8"># ── MLN quick sync ───────────────────────────────────────────────────────────<text:line-break/></text:span><text:span text:style-name="T2">if </text:span><text:span text:style-name="T5">"_sync_msg" </text:span><text:span text:style-name="T2">in </text:span><text:span text:style-name="T3">st.session_state:<text:line-break/> <text:s text:c="3"/>st.success(st.session_state.pop(</text:span><text:span text:style-name="T5">"_sync_msg"</text:span><text:span text:style-name="T3">))<text:line-break/></text:span><text:span text:style-name="T2">if </text:span><text:span text:style-name="T5">"_sync_errors" </text:span><text:span text:style-name="T2">in </text:span><text:span text:style-name="T3">st.session_state:<text:line-break/> <text:s text:c="3"/>_errs_disp = st.session_state.pop(</text:span><text:span text:style-name="T5">"_sync_errors"</text:span><text:span text:style-name="T3">)<text:line-break/> <text:s text:c="3"/></text:span><text:span text:style-name="T2">with </text:span><text:span text:style-name="T3">st.expander(</text:span><text:span text:style-name="T5">f"</text:span><text:span text:style-name="T2">{</text:span><text:span text:style-name="T10">len</text:span><text:span text:style-name="T3">(_errs_disp)</text:span><text:span text:style-name="T2">}</text:span><text:span text:style-name="T5"> issue(s)"</text:span><text:span text:style-name="T3">):<text:line-break/> <text:s text:c="7"/></text:span><text:span text:style-name="T2">for </text:span><text:span text:style-name="T3">_m </text:span><text:span text:style-name="T2">in </text:span><text:span text:style-name="T3">_errs_disp[:</text:span><text:span text:style-name="T7">30</text:span><text:span text:style-name="T3">]:<text:line-break/> <text:s text:c="11"/>st.caption(_m)<text:line-break/><text:line-break/>st.divider()<text:line-break/><text:line-break/></text:span><text:span text:style-name="T8"># ── data ─────────────────────────────────────────────────────────────────────<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pitcher_plays</text:span><text:span text:style-name="T3">(pitcher_name: </text:span><text:span text:style-name="T10">str</text:span><text:span text:style-name="T3">, leagues: </text:span><text:span text:style-name="T10">tuple</text:span><text:span text:style-name="T3">[</text:span><text:span text:style-name="T10">str</text:span><text:span text:style-name="T3">, ...], data_v: </text:span><text:span text:style-name="T10">int </text:span><text:span text:style-name="T3">= </text:span><text:span text:style-name="T7">0</text:span><text:span text:style-name="T3">) -&gt; pd.DataFrame:<text:line-break/> <text:s text:c="3"/>raw = db.get_plays_for_pitcher(pitcher_name, </text:span><text:span text:style-name="T10">list</text:span><text:span text:style-name="T3">(leagues) </text:span><text:span text:style-name="T2">if </text:span><text:span text:style-name="T3">leagues </text:span><text:span text:style-name="T2">else None</text:span><text:span text:style-name="T3">)<text:line-break/> <text:s text:c="3"/></text:span><text:span text:style-name="T2">return </text:span><text:span text:style-name="T3">utils.enrich_df(utils.flatten_games(raw)) </text:span><text:span text:style-name="T2">if </text:span><text:span text:style-name="T3">raw </text:span><text:span text:style-name="T2">else </text:span><text:span text:style-name="T3">pd.DataFrame()<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batter_plays</text:span><text:span text:style-name="T3">(batter_name: </text:span><text:span text:style-name="T10">str</text:span><text:span text:style-name="T3">, leagues: </text:span><text:span text:style-name="T10">tuple</text:span><text:span text:style-name="T3">[</text:span><text:span text:style-name="T10">str</text:span><text:span text:style-name="T3">, ...], data_v: </text:span><text:span text:style-name="T10">int </text:span><text:span text:style-name="T3">= </text:span><text:span text:style-name="T7">0</text:span><text:span text:style-name="T3">) -&gt; pd.DataFrame:<text:line-break/> <text:s text:c="3"/>raw = db.get_plays_for_batter(batter_name, </text:span><text:span text:style-name="T10">list</text:span><text:span text:style-name="T3">(leagues) </text:span><text:span text:style-name="T2">if </text:span><text:span text:style-name="T3">leagues </text:span><text:span text:style-name="T2">else None</text:span><text:span text:style-name="T3">)<text:line-break/> <text:s text:c="3"/></text:span><text:span text:style-name="T2">return </text:span><text:span text:style-name="T3">utils.enrich_df(utils.flatten_games(raw)) </text:span><text:span text:style-name="T2">if </text:span><text:span text:style-name="T3">raw </text:span><text:span text:style-name="T2">else </text:span><text:span text:style-name="T3">pd.DataFrame()<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team_offense_plays</text:span><text:span text:style-name="T3">(team_name: </text:span><text:span text:style-name="T10">str</text:span><text:span text:style-name="T3">, leagues: </text:span><text:span text:style-name="T10">tuple</text:span><text:span text:style-name="T3">[</text:span><text:span text:style-name="T10">str</text:span><text:span text:style-name="T3">, ...]) -&gt; pd.DataFrame:<text:line-break/> <text:s text:c="3"/>raw = db.get_plays_for_team_offense(team_name, </text:span><text:span text:style-name="T10">list</text:span><text:span text:style-name="T3">(leagues) </text:span><text:span text:style-name="T2">if </text:span><text:span text:style-name="T3">leagues </text:span><text:span text:style-name="T2">else None</text:span><text:span text:style-name="T3">)<text:line-break/> <text:s text:c="3"/></text:span><text:span text:style-name="T2">return </text:span><text:span text:style-name="T3">utils.enrich_df(utils.flatten_games(raw)) </text:span><text:span text:style-name="T2">if </text:span><text:span text:style-name="T3">raw </text:span><text:span text:style-name="T2">else </text:span><text:span text:style-name="T3">pd.DataFrame()<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all_games</text:span><text:span text:style-name="T3">() -&gt; </text:span><text:span text:style-name="T10">list</text:span><text:span text:style-name="T3">:<text:line-break/> <text:s text:c="3"/></text:span><text:span text:style-name="T2">return </text:span><text:span text:style-name="T3">db.get_games()<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scrimmage_plays</text:span><text:span text:style-name="T3">() -&gt; pd.DataFrame:<text:line-break/> <text:s text:c="3"/>raw = db.get_all_scrimmage_plays()<text:line-break/> <text:s text:c="3"/></text:span><text:span text:style-name="T2">return </text:span><text:span text:style-name="T3">utils.enrich_df(utils.flatten_games(raw)) </text:span><text:span text:style-name="T2">if </text:span><text:span text:style-name="T3">raw </text:span><text:span text:style-name="T2">else </text:span><text:span text:style-name="T3">pd.DataFrame()<text:line-break/><text:line-break/></text:span><text:soft-page-break/><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all_players</text:span><text:span text:style-name="T3">() -&gt; </text:span><text:span text:style-name="T10">list</text:span><text:span text:style-name="T3">:<text:line-break/> <text:s text:c="3"/></text:span><text:span text:style-name="T2">return </text:span><text:span text:style-name="T3">db.get_all_players()<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all_teams_data</text:span><text:span text:style-name="T3">() -&gt; </text:span><text:span text:style-name="T10">list</text:span><text:span text:style-name="T3">:<text:line-break/> <text:s text:c="3"/></text:span><text:span text:style-name="T2">return </text:span><text:span text:style-name="T3">db.get_all_teams()<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run_lookup</text:span><text:span text:style-name="T3">(_v: </text:span><text:span text:style-name="T10">int </text:span><text:span text:style-name="T3">= </text:span><text:span text:style-name="T7">3</text:span><text:span text:style-name="T3">) -&gt; </text:span><text:span text:style-name="T10">dict</text:span><text:span text:style-name="T3">:<text:line-break/> <text:s text:c="3"/></text:span><text:span text:style-name="T8"># (result, before_obc, outs) -&gt; (runs, new_obc, nout_after)<text:line-break/> <text:s text:c="3"/></text:span><text:span text:style-name="T2">return </text:span><text:span text:style-name="T3">utils.load_run_lookup_from_csv(</text:span><text:span text:style-name="T5">"import_BRC.csv"</text:span><text:span text:style-name="T3">)<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pitcher_stats</text:span><text:span text:style-name="T3">() -&gt; pd.DataFrame:<text:line-break/> <text:s text:c="3"/>rows = db.get_pitcher_stats()<text:line-break/> <text:s text:c="3"/></text:span><text:span text:style-name="T2">return </text:span><text:span text:style-name="T3">pd.DataFrame(rows) </text:span><text:span text:style-name="T2">if </text:span><text:span text:style-name="T3">rows </text:span><text:span text:style-name="T2">else </text:span><text:span text:style-name="T3">pd.DataFrame()<text:line-break/><text:line-break/></text:span><text:span text:style-name="T12">@st.cache_data</text:span><text:span text:style-name="T3">(</text:span><text:span text:style-name="T4">ttl</text:span><text:span text:style-name="T3">=</text:span><text:span text:style-name="T7">60</text:span><text:span text:style-name="T3">)<text:line-break/></text:span><text:span text:style-name="T2">def </text:span><text:span text:style-name="T9">_load_game_plays</text:span><text:span text:style-name="T3">(game_id: </text:span><text:span text:style-name="T10">int</text:span><text:span text:style-name="T3">) -&gt; </text:span><text:span text:style-name="T10">list</text:span><text:span text:style-name="T3">[</text:span><text:span text:style-name="T10">dict</text:span><text:span text:style-name="T3">]:<text:line-break/> <text:s text:c="3"/></text:span><text:span text:style-name="T2">return </text:span><text:span text:style-name="T3">db.get_plays_for_game(game_id)<text:line-break/><text:line-break/></text:span><text:span text:style-name="T12">@st.cache_data</text:span><text:span text:style-name="T3">(</text:span><text:span text:style-name="T4">ttl</text:span><text:span text:style-name="T3">=</text:span><text:span text:style-name="T7">3600</text:span><text:span text:style-name="T3">)<text:line-break/></text:span><text:span text:style-name="T2">def </text:span><text:span text:style-name="T9">_load_sheet_names</text:span><text:span text:style-name="T3">(urls: </text:span><text:span text:style-name="T10">tuple</text:span><text:span text:style-name="T3">[</text:span><text:span text:style-name="T10">str</text:span><text:span text:style-name="T3">, ...]) -&gt; </text:span><text:span text:style-name="T10">dict</text:span><text:span text:style-name="T3">[</text:span><text:span text:style-name="T10">str</text:span><text:span text:style-name="T3">, </text:span><text:span text:style-name="T10">str</text:span><text:span text:style-name="T3">]:<text:line-break/> <text:s text:c="3"/></text:span><text:span text:style-name="T2">from </text:span><text:span text:style-name="T3">concurrent.futures </text:span><text:span text:style-name="T2">import </text:span><text:span text:style-name="T3">ThreadPoolExecutor, as_completed<text:line-break/> <text:s text:c="3"/>result: </text:span><text:span text:style-name="T10">dict</text:span><text:span text:style-name="T3">[</text:span><text:span text:style-name="T10">str</text:span><text:span text:style-name="T3">, </text:span><text:span text:style-name="T10">str</text:span><text:span text:style-name="T3">] = {}<text:line-break/> <text:s text:c="3"/></text:span><text:span text:style-name="T2">with </text:span><text:span text:style-name="T3">ThreadPoolExecutor(</text:span><text:span text:style-name="T4">max_workers</text:span><text:span text:style-name="T3">=</text:span><text:span text:style-name="T7">8</text:span><text:span text:style-name="T3">) </text:span><text:span text:style-name="T2">as </text:span><text:span text:style-name="T3">ex:<text:line-break/> <text:s text:c="7"/>futures = {ex.submit(utils.get_sheet_name, url): url </text:span><text:span text:style-name="T2">for </text:span><text:span text:style-name="T3">url </text:span><text:span text:style-name="T2">in </text:span><text:span text:style-name="T3">urls}<text:line-break/> <text:s text:c="7"/></text:span><text:span text:style-name="T2">for </text:span><text:span text:style-name="T3">future </text:span><text:span text:style-name="T2">in </text:span><text:span text:style-name="T3">as_completed(futures):<text:line-break/> <text:s text:c="11"/>url = futures[future]<text:line-break/> <text:s text:c="11"/></text:span><text:span text:style-name="T2">try</text:span><text:span text:style-name="T3">:<text:line-break/> <text:s text:c="15"/>result[url] = future.result()<text:line-break/> <text:s text:c="11"/></text:span><text:span text:style-name="T2">except </text:span><text:span text:style-name="T10">Exception</text:span><text:span text:style-name="T3">:<text:line-break/> <text:s text:c="15"/>result[url] = url<text:line-break/> <text:s text:c="3"/></text:span><text:span text:style-name="T2">return </text:span><text:span text:style-name="T3">result</text:span></text:p>
      <text:p text:style-name="P1"/>
      <text:p text:style-name="P1"><text:span text:style-name="T1">pages/1_Games.py – some sync functions:</text:span></text:p>
      <text:p text:style-name="P2" loext:marker-style-name="T3"><text:span text:style-name="T2">def </text:span><text:span text:style-name="T9">_sync_games</text:span><text:span text:style-name="T3">(sheet_id: </text:span><text:span text:style-name="T10">str</text:span><text:span text:style-name="T3">) -&gt; </text:span><text:span text:style-name="T10">tuple</text:span><text:span text:style-name="T3">[</text:span><text:span text:style-name="T10">int</text:span><text:span text:style-name="T3">, </text:span><text:span text:style-name="T10">list</text:span><text:span text:style-name="T3">[</text:span><text:span text:style-name="T10">str</text:span><text:span text:style-name="T3">]]:<text:line-break/> <text:s text:c="3"/>games = utils.read_games_from_sheet(sheet_id)<text:line-break/> <text:s text:c="3"/></text:span><text:span text:style-name="T2">if not </text:span><text:span text:style-name="T3">games:<text:line-break/> <text:s text:c="7"/></text:span><text:span text:style-name="T2">return </text:span><text:span text:style-name="T7">0</text:span><text:span text:style-name="T3">, [</text:span><text:span text:style-name="T5">"No games found in the Games tab."</text:span><text:span text:style-name="T3">]<text:line-break/> <text:s text:c="3"/></text:span><text:span text:style-name="T8"># The RLN sheet's "League" column is a spreadsheet boolean, not the league name.<text:line-break/> <text:s text:c="3"/></text:span><text:span text:style-name="T2">for </text:span><text:span text:style-name="T3">g </text:span><text:span text:style-name="T2">in </text:span><text:span text:style-name="T3">games:<text:line-break/> <text:s text:c="7"/>g[</text:span><text:span text:style-name="T5">"league"</text:span><text:span text:style-name="T3">] = </text:span><text:span text:style-name="T5">"RLN"<text:line-break/> <text:s text:c="7"/></text:span><text:span text:style-name="T3">g[</text:span><text:span text:style-name="T5">"game_type"</text:span><text:span text:style-name="T3">] = </text:span><text:span text:style-name="T5">"live"<text:line-break/> <text:s text:c="3"/></text:span><text:span text:style-name="T2">try</text:span><text:span text:style-name="T3">:<text:line-break/> <text:s text:c="7"/>n = db.bulk_upsert_games(games)<text:line-break/> <text:s text:c="7"/></text:span><text:span text:style-name="T2">return </text:span><text:span text:style-name="T3">n, []<text:line-break/> <text:s text:c="3"/></text:span><text:span text:style-name="T2">except </text:span><text:span text:style-name="T10">Exception </text:span><text:span text:style-name="T2">as </text:span><text:span text:style-name="T3">e:<text:line-break/> <text:s text:c="7"/></text:span><text:span text:style-name="T2">return </text:span><text:span text:style-name="T7">0</text:span><text:span text:style-name="T3">, [</text:span><text:span text:style-name="T10">str</text:span><text:span text:style-name="T3">(e)]<text:line-break/><text:line-break/><text:line-break/></text:span><text:span text:style-name="T2">def </text:span><text:span text:style-name="T9">_sync_plays</text:span><text:span text:style-name="T3">(sheet_id: </text:span><text:span text:style-name="T10">str</text:span><text:span text:style-name="T3">) -&gt; </text:span><text:span text:style-name="T10">tuple</text:span><text:span text:style-name="T3">[</text:span><text:span text:style-name="T10">int</text:span><text:span text:style-name="T3">, </text:span><text:span text:style-name="T10">list</text:span><text:span text:style-name="T3">[</text:span><text:span text:style-name="T10">str</text:span><text:span text:style-name="T3">]]:<text:line-break/> <text:s text:c="3"/>plays = utils.read_plays_from_sheet(sheet_id)<text:line-break/> <text:s text:c="3"/></text:span><text:span text:style-name="T2">if not </text:span><text:span text:style-name="T3">plays:<text:line-break/> <text:s text:c="7"/></text:span><text:span text:style-name="T2">return </text:span><text:span text:style-name="T7">0</text:span><text:span text:style-name="T3">, [</text:span><text:span text:style-name="T5">"No plays found in the Plays (Raw) tab."</text:span><text:span text:style-name="T3">]<text:line-break/><text:line-break/> <text:s text:c="3"/>all_games <text:s text:c="2"/>= db.get_games()<text:line-break/> <text:s text:c="3"/>all_players = db.get_all_players()<text:line-break/> <text:s text:c="3"/>game_code_to_id <text:s/>= {g[</text:span><text:span text:style-name="T5">"game_code"</text:span><text:span text:style-name="T3">]: g[</text:span><text:span text:style-name="T5">"id"</text:span><text:span text:style-name="T3">] </text:span><text:span text:style-name="T2">for </text:span><text:span text:style-name="T3">g </text:span><text:span text:style-name="T2">in </text:span><text:span text:style-name="T3">all_games </text:span><text:span text:style-name="T2">if </text:span><text:span text:style-name="T3">g.get(</text:span><text:span text:style-name="T5">"game_code"</text:span><text:span text:style-name="T3">)}<text:line-break/> <text:s text:c="3"/>player_id_to_name = {p[</text:span><text:span text:style-name="T5">"player_id"</text:span><text:span text:style-name="T3">]: p[</text:span><text:span text:style-name="T5">"name"</text:span><text:span text:style-name="T3">] </text:span><text:span text:style-name="T2">for </text:span><text:span text:style-name="T3">p </text:span><text:span text:style-name="T2">in </text:span><text:span text:style-name="T3">all_players </text:span><text:span text:style-name="T2">if </text:span><text:span text:style-name="T3">p.get(</text:span><text:span text:style-name="T5">"player_id"</text:span><text:span text:style-name="T3">) </text:span><text:span text:style-name="T2">and </text:span><text:span text:style-name="T3">p.get(</text:span><text:span text:style-name="T5">"name"</text:span><text:span text:style-name="T3">)}<text:line-break/><text:line-break/> <text:s text:c="3"/>plays_sorted = </text:span><text:span text:style-name="T10">sorted</text:span><text:span text:style-name="T3">(plays, </text:span><text:span text:style-name="T4">key</text:span><text:span text:style-name="T3">=</text:span><text:span text:style-name="T2">lambda </text:span><text:span text:style-name="T3">p: p[</text:span><text:span text:style-name="T5">"play_num"</text:span><text:span text:style-name="T3">])<text:line-break/> <text:s text:c="3"/>seen_inn: <text:s text:c="4"/></text:span><text:span text:style-name="T10">dict</text:span><text:span text:style-name="T3">[</text:span><text:span text:style-name="T10">str</text:span><text:span text:style-name="T3">, </text:span><text:span text:style-name="T10">set</text:span><text:span text:style-name="T3">] = {}<text:line-break/></text:span><text:soft-page-break/><text:span text:style-name="T3"> <text:s text:c="3"/>seen_pitcher: </text:span><text:span text:style-name="T10">dict</text:span><text:span text:style-name="T3">[</text:span><text:span text:style-name="T10">str</text:span><text:span text:style-name="T3">, </text:span><text:span text:style-name="T10">set</text:span><text:span text:style-name="T3">] = {}<text:line-break/> <text:s text:c="3"/>outs_tracker: </text:span><text:span text:style-name="T10">dict</text:span><text:span text:style-name="T3">[</text:span><text:span text:style-name="T10">tuple</text:span><text:span text:style-name="T3">, </text:span><text:span text:style-name="T10">int</text:span><text:span text:style-name="T3">] = {} <text:s text:c="2"/></text:span><text:span text:style-name="T8"># (game_code, inning, half) → outs before this play<text:line-break/> <text:s text:c="3"/></text:span><text:span text:style-name="T3">errors: </text:span><text:span text:style-name="T10">list</text:span><text:span text:style-name="T3">[</text:span><text:span text:style-name="T10">str</text:span><text:span text:style-name="T3">] = []<text:line-break/> <text:s text:c="3"/>rows: <text:s text:c="2"/></text:span><text:span text:style-name="T10">list</text:span><text:span text:style-name="T3">[</text:span><text:span text:style-name="T10">dict</text:span><text:span text:style-name="T3">] = []<text:line-break/><text:line-break/> <text:s text:c="3"/></text:span><text:span text:style-name="T2">for </text:span><text:span text:style-name="T3">play </text:span><text:span text:style-name="T2">in </text:span><text:span text:style-name="T3">plays_sorted:<text:line-break/> <text:s text:c="7"/>gc = play[</text:span><text:span text:style-name="T5">"game_code"</text:span><text:span text:style-name="T3">]<text:line-break/> <text:s text:c="7"/>game_db_id = game_code_to_id.get(gc)<text:line-break/> <text:s text:c="7"/></text:span><text:span text:style-name="T2">if not </text:span><text:span text:style-name="T3">game_db_id:<text:line-break/> <text:s text:c="11"/>errors.append(</text:span><text:span text:style-name="T5">f"Play </text:span><text:span text:style-name="T2">{</text:span><text:span text:style-name="T3">play[</text:span><text:span text:style-name="T5">'play_num'</text:span><text:span text:style-name="T3">]</text:span><text:span text:style-name="T2">}</text:span><text:span text:style-name="T5">: game </text:span><text:span text:style-name="T2">{</text:span><text:span text:style-name="T3">gc</text:span><text:span text:style-name="T2">}</text:span><text:span text:style-name="T5"> not found - sync Games first."</text:span><text:span text:style-name="T3">)<text:line-break/> <text:s text:c="11"/></text:span><text:span text:style-name="T2">continue<text:line-break/><text:line-break/> <text:s text:c="7"/></text:span><text:span text:style-name="T8"># Player name lookups<text:line-break/> <text:s text:c="7"/></text:span><text:span text:style-name="T3">pitcher_name = player_id_to_name.get(play.get(</text:span><text:span text:style-name="T5">"pitcher_id"</text:span><text:span text:style-name="T3">), </text:span><text:span text:style-name="T5">""</text:span><text:span text:style-name="T3">)<text:line-break/> <text:s text:c="7"/>batter_name <text:s/>= player_id_to_name.get(play.get(</text:span><text:span text:style-name="T5">"batter_id"</text:span><text:span text:style-name="T3">), <text:s/></text:span><text:span text:style-name="T5">""</text:span><text:span text:style-name="T3">)<text:line-break/> <text:s text:c="7"/>catcher_name = player_id_to_name.get(play.get(</text:span><text:span text:style-name="T5">"catcher_id"</text:span><text:span text:style-name="T3">))<text:line-break/> <text:s text:c="7"/>runner_name <text:s/>= player_id_to_name.get(play.get(</text:span><text:span text:style-name="T5">"runner_id"</text:span><text:span text:style-name="T3">))<text:line-break/><text:line-break/> <text:s text:c="7"/></text:span><text:span text:style-name="T8"># off/def team from away/home + inning half<text:line-break/> <text:s text:c="7"/></text:span><text:span text:style-name="T3">away_full = utils.TEAM_ABBREV.get(play.get(</text:span><text:span text:style-name="T5">"away"</text:span><text:span text:style-name="T3">) </text:span><text:span text:style-name="T2">or </text:span><text:span text:style-name="T5">""</text:span><text:span text:style-name="T3">, play.get(</text:span><text:span text:style-name="T5">"away"</text:span><text:span text:style-name="T3">) </text:span><text:span text:style-name="T2">or </text:span><text:span text:style-name="T5">""</text:span><text:span text:style-name="T3">)<text:line-break/> <text:s text:c="7"/>home_full = utils.TEAM_ABBREV.get(play.get(</text:span><text:span text:style-name="T5">"home"</text:span><text:span text:style-name="T3">) </text:span><text:span text:style-name="T2">or </text:span><text:span text:style-name="T5">""</text:span><text:span text:style-name="T3">, play.get(</text:span><text:span text:style-name="T5">"home"</text:span><text:span text:style-name="T3">) </text:span><text:span text:style-name="T2">or </text:span><text:span text:style-name="T5">""</text:span><text:span text:style-name="T3">)<text:line-break/> <text:s text:c="7"/></text:span><text:span text:style-name="T2">if </text:span><text:span text:style-name="T3">play[</text:span><text:span text:style-name="T5">"half"</text:span><text:span text:style-name="T3">] == </text:span><text:span text:style-name="T5">"top"</text:span><text:span text:style-name="T3">:<text:line-break/> <text:s text:c="11"/>off_team, def_team = away_full, home_full<text:line-break/> <text:s text:c="7"/></text:span><text:span text:style-name="T2">else</text:span><text:span text:style-name="T3">:<text:line-break/> <text:s text:c="11"/>off_team, def_team = home_full, away_full<text:line-break/><text:line-break/> <text:s text:c="7"/></text:span><text:span text:style-name="T8"># Circular diff<text:line-break/> <text:s text:c="7"/></text:span><text:span text:style-name="T3">pitch, swing = play.get(</text:span><text:span text:style-name="T5">"pitch"</text:span><text:span text:style-name="T3">), play.get(</text:span><text:span text:style-name="T5">"swing"</text:span><text:span text:style-name="T3">)<text:line-break/> <text:s text:c="7"/>diff = utils.circular_diff(</text:span><text:span text:style-name="T10">int</text:span><text:span text:style-name="T3">(pitch), </text:span><text:span text:style-name="T10">int</text:span><text:span text:style-name="T3">(swing)) </text:span><text:span text:style-name="T2">if </text:span><text:span text:style-name="T3">pitch </text:span><text:span text:style-name="T2">is not None and </text:span><text:span text:style-name="T3">swing </text:span><text:span text:style-name="T2">is not None else None<text:line-break/><text:line-break/> <text:s text:c="7"/></text:span><text:span text:style-name="T8"># Outs: running count per half-inning<text:line-break/> <text:s text:c="7"/></text:span><text:span text:style-name="T3">inn_key = (gc, play[</text:span><text:span text:style-name="T5">"inning"</text:span><text:span text:style-name="T3">], play[</text:span><text:span text:style-name="T5">"half"</text:span><text:span text:style-name="T3">])<text:line-break/> <text:s text:c="7"/></text:span><text:span text:style-name="T2">if </text:span><text:span text:style-name="T3">inn_key </text:span><text:span text:style-name="T2">not in </text:span><text:span text:style-name="T3">outs_tracker:<text:line-break/> <text:s text:c="11"/>outs_tracker[inn_key] = </text:span><text:span text:style-name="T7">0<text:line-break/> <text:s text:c="7"/></text:span><text:span text:style-name="T3">outs = outs_tracker[inn_key]<text:line-break/> <text:s text:c="7"/>outs_tracker[inn_key] = </text:span><text:span text:style-name="T10">min</text:span><text:span text:style-name="T3">(</text:span><text:span text:style-name="T7">3</text:span><text:span text:style-name="T3">, outs + utils.outs_added(play.get(</text:span><text:span text:style-name="T5">"result"</text:span><text:span text:style-name="T3">) </text:span><text:span text:style-name="T2">or </text:span><text:span text:style-name="T5">""</text:span><text:span text:style-name="T3">))<text:line-break/><text:line-break/> <text:s text:c="7"/></text:span><text:span text:style-name="T8"># First-pitch flags (keyed on pitcher_name)<text:line-break/> <text:s text:c="7"/></text:span><text:span text:style-name="T3">fp_inn_key = (play[</text:span><text:span text:style-name="T5">"inning"</text:span><text:span text:style-name="T3">], play[</text:span><text:span text:style-name="T5">"half"</text:span><text:span text:style-name="T3">])<text:line-break/> <text:s text:c="7"/>is_fp_inn = fp_inn_key </text:span><text:span text:style-name="T2">not in </text:span><text:span text:style-name="T3">seen_inn.setdefault(gc, </text:span><text:span text:style-name="T10">set</text:span><text:span text:style-name="T3">())<text:line-break/> <text:s text:c="7"/>is_fp_app = pitcher_name </text:span><text:span text:style-name="T2">not in </text:span><text:span text:style-name="T3">seen_pitcher.setdefault(gc, </text:span><text:span text:style-name="T10">set</text:span><text:span text:style-name="T3">())<text:line-break/> <text:s text:c="7"/>seen_inn[gc].add(fp_inn_key)<text:line-break/> <text:s text:c="7"/></text:span><text:span text:style-name="T2">if </text:span><text:span text:style-name="T3">pitcher_name:<text:line-break/> <text:s text:c="11"/>seen_pitcher[gc].add(pitcher_name)<text:line-break/><text:line-break/> <text:s text:c="7"/>rows.append({<text:line-break/> <text:s text:c="11"/>**{k: v </text:span><text:span text:style-name="T2">for </text:span><text:span text:style-name="T3">k, v </text:span><text:span text:style-name="T2">in </text:span><text:span text:style-name="T3">play.items() </text:span><text:span text:style-name="T2">if </text:span><text:span text:style-name="T3">k != </text:span><text:span text:style-name="T5">"game_code"</text:span><text:span text:style-name="T3">},<text:line-break/> <text:s text:c="11"/></text:span><text:span text:style-name="T5">"game_code"</text:span><text:span text:style-name="T3">: <text:s text:c="3"/>gc,<text:line-break/> <text:s text:c="11"/></text:span><text:span text:style-name="T5">"league"</text:span><text:span text:style-name="T3">: <text:s text:c="6"/></text:span><text:span text:style-name="T5">"RLN"</text:span><text:span text:style-name="T3">,<text:line-break/> <text:s text:c="11"/></text:span><text:span text:style-name="T5">"game_type"</text:span><text:span text:style-name="T3">: <text:s text:c="3"/></text:span><text:span text:style-name="T5">"live"</text:span><text:span text:style-name="T3">,<text:line-break/> <text:s text:c="11"/></text:span><text:span text:style-name="T5">"season"</text:span><text:span text:style-name="T3">: <text:s text:c="6"/>_CURRENT_RLN_SEASON,<text:line-break/> <text:s text:c="11"/></text:span><text:span text:style-name="T5">"game_id"</text:span><text:span text:style-name="T3">: <text:s text:c="5"/>game_db_id,<text:line-break/> <text:s text:c="11"/></text:span><text:span text:style-name="T5">"pitcher_name"</text:span><text:span text:style-name="T3">: pitcher_name,<text:line-break/> <text:s text:c="11"/></text:span><text:span text:style-name="T5">"batter_name"</text:span><text:span text:style-name="T3">: <text:s/>batter_name,<text:line-break/> <text:s text:c="11"/></text:span><text:span text:style-name="T5">"catcher_name"</text:span><text:span text:style-name="T3">: catcher_name,<text:line-break/> <text:s text:c="11"/></text:span><text:span text:style-name="T5">"runner_name"</text:span><text:span text:style-name="T3">: <text:s/>runner_name,<text:line-break/> <text:s text:c="11"/></text:span><text:span text:style-name="T5">"off_team"</text:span><text:span text:style-name="T3">: <text:s text:c="4"/>off_team,<text:line-break/> <text:s text:c="11"/></text:span><text:span text:style-name="T5">"def_team"</text:span><text:span text:style-name="T3">: <text:s text:c="4"/>def_team,<text:line-break/> <text:s text:c="11"/></text:span><text:span text:style-name="T5">"diff"</text:span><text:span text:style-name="T3">: <text:s text:c="8"/>diff,<text:line-break/> <text:s text:c="11"/></text:span><text:span text:style-name="T5">"outs"</text:span><text:span text:style-name="T3">: <text:s text:c="8"/>outs,<text:line-break/> <text:s text:c="11"/></text:span><text:span text:style-name="T5">"is_fp_inn"</text:span><text:span text:style-name="T3">: <text:s text:c="3"/>is_fp_inn,<text:line-break/> <text:s text:c="11"/></text:span><text:span text:style-name="T5">"is_fp_app"</text:span><text:span text:style-name="T3">: <text:s text:c="3"/>is_fp_app,<text:line-break/> <text:s text:c="7"/>})<text:line-break/><text:line-break/> <text:s text:c="3"/></text:span><text:span text:style-name="T2">if not </text:span><text:span text:style-name="T3">rows:<text:line-break/></text:span><text:soft-page-break/><text:span text:style-name="T3"> <text:s text:c="7"/></text:span><text:span text:style-name="T2">return </text:span><text:span text:style-name="T7">0</text:span><text:span text:style-name="T3">, errors<text:line-break/><text:line-break/> <text:s text:c="3"/></text:span><text:span text:style-name="T2">try</text:span><text:span text:style-name="T3">:<text:line-break/> <text:s text:c="7"/>n = db.bulk_upsert_plays(rows)<text:line-break/> <text:s text:c="7"/></text:span><text:span text:style-name="T2">return </text:span><text:span text:style-name="T3">n, errors<text:line-break/> <text:s text:c="3"/></text:span><text:span text:style-name="T2">except </text:span><text:span text:style-name="T10">Exception </text:span><text:span text:style-name="T2">as </text:span><text:span text:style-name="T3">e:<text:line-break/> <text:s text:c="7"/></text:span><text:span text:style-name="T2">return </text:span><text:span text:style-name="T7">0</text:span><text:span text:style-name="T3">, errors + [</text:span><text:span text:style-name="T10">str</text:span><text:span text:style-name="T3">(e)]<text:line-break/></text:span></text:p>
      <text:p text:style-name="P1">Specific questions:<text:line-break/>- What is the right @st.cache_data TTL and keying strategy so efetches from Supabase when data has actually changed(post-sync), not on every widget interaction?<text:line-break/>- Which parts of the Scouting page are good candidates for @st.fragment to scope reruns to only the affected section?<text:line-break/>- For Sync MLN, are there async or parallel patterns availablewould speed up the Sheets fetch + Supabase write?<text:line-break/><text:line-break/>---<text:line-break/>Constraints:<text:line-break/>- Deployed on Streamlit Community Cloud (no control over server process lifecycle)<text:line-break/>- Python only, no separate backend service<text:line-break/>- Supabase for auth and data (Postgres under the hood)<text:line-break/>- Must maintain existing email/password auth flow — no OAuth c<text:line-break/>- The app is single-page per user (not multi-user concurrent scale concern)<text:line-break/><text:line-break/>Deliverable I want: A prioritized list of concrete changes to make, with the most impactful fixes first. For each change: what to do, why it solves the problem, and any tradeoff or risk to be aware of. Code snippets where the fix is non-obvious. Do not rewrite the whole app — focus on targeted chan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Response:</text:p>
      <text:p text:style-name="P3">Before the prioritized list, the diagnosis that drives it — because your logout problem has a specific root cause visible in this code.<text:line-break/><text:line-break/>Why users get logged out<text:line-break/><text:line-break/>Supabase rotates refresh tokens: every refresh_session(T1) invalidates T1 and issues T2. Your only way to persist T2 is a JavaScript cookie write via components.html — and that write is asynchronous and unreliable. The iframe must reach the browser and execute before the user refreshes, closes the tab, or a st.rerun() cancels pending components. Your login flow does exactly that: _cookie_write(refresh_token) followed immediately by st.rerun() — a race where the rerun can discard the component before the JS ever runs.<text:line-break/><text:line-break/>So the failure loop is: cookie holds T1 → restore rotates to T2 → JS write silently fails or is cancelled → cookie still holds dead T1 → next visit, refresh_session(T1) fails → login screen. Worse, Supabase's reuse detection revokes the entire token family when a stale token is replayed outside the ~10s reuse interval, so one failed write can kill the session permanently. Opening the app in two tabs triggers the same family revocation (both tabs replay the same cookie token). This is why it happens "almost every time" after inactivity.<text:line-break/><text:line-break/>Your multi-device logout is a separate, definite bug: client.auth.sign_out() defaults to global scope — it revokes every session on every device.<text:line-break/><text:line-break/>The structural lesson: rotating tokens are incompatible with Streamlit's flaky JS cookie writes. Store a token that never rotates, so writes are idempotent and a failed write costs nothing.<text:line-break/><text:line-break/>---<text:line-break/>Prioritized changes<text:line-break/><text:line-break/>1. Replace the rotating refresh token with your own non-rotating device token (fixes logouts)<text:line-break/><text:line-break/>Keep Supabase Auth for password verification at login. But for persistence, mint your own opaque token per device, stored in a table:<text:line-break/><text:line-break/>create table device_sessions (<text:line-break/> <text:s/>token_hash <text:s/>text primary key,<text:line-break/> <text:s/>user_id <text:s text:c="4"/>uuid not null,<text:line-break/> <text:s/>user_email <text:s/>text not null,<text:line-break/> <text:s/>created_at <text:s/>timestamptz default now(),<text:line-break/> <text:s/>last_seen <text:s text:c="2"/>timestamptz default now()<text:line-break/>);<text:line-break/><text:line-break/># auth.py additions<text:line-break/>import hashlib, secrets<text:line-break/><text:line-break/>def create_device_session(user_id: str, email: str) -&gt; str:<text:line-break/> <text:s text:c="3"/>raw = secrets.token_urlsafe(32)<text:line-break/> <text:s text:c="3"/>h = hashlib.sha256(raw.encode()).hexdigest()<text:line-break/> <text:s text:c="3"/>_make_client().table("device_sessions").insert(<text:line-break/><text:soft-page-break/> <text:s text:c="7"/>{"token_hash": h, "user_id": user_id, "user_email": email}<text:line-break/> <text:s text:c="3"/>).execute()<text:line-break/> <text:s text:c="3"/>return raw<text:line-break/><text:line-break/>def restore_device_session(raw: str) -&gt; tuple[str, str] | None:<text:line-break/> <text:s text:c="3"/>h = hashlib.sha256(raw.encode()).hexdigest()<text:line-break/> <text:s text:c="3"/>rows = (_make_client().table("device_sessions")<text:line-break/> <text:s text:c="11"/>.select("user_id, user_email").eq("token_hash", h)<text:line-break/> <text:s text:c="11"/>.execute().data)<text:line-break/> <text:s text:c="3"/>return (rows[0]["user_id"], rows[0]["user_email"]) if rows else None<text:line-break/><text:line-break/>def revoke_device_session(raw: str) -&gt; None:<text:line-break/> <text:s text:c="3"/>h = hashlib.sha256(raw.encode()).hexdigest()<text:line-break/> <text:s text:c="3"/>_make_client().table("device_sessions").delete().eq("token_hash", h).execute()<text:line-break/><text:line-break/>In app.py: on login, call sign_in() to verify the password, then create_device_session() and write that token to the cookie. On restore, look up the cookie token — no rotation, no race. Because the token never changes, you can even re-write the cookie every load harmlessly. Each device gets its own row, so devices are fully independent; sign-out deletes one row.<text:line-break/><text:line-break/>Why this works where the current code can't: the cookie write becomes idempotent. Streamlit can drop the JS write nine times out of ten and nothing breaks, because the cookie already holds the right value.<text:line-break/><text:line-break/>Tradeoffs: you own session revocation now (add "sign out everywhere" by deleting all rows for a user_id if you want it). You're discarding the Supabase session object — fine here, because database.py uses one shared key for all queries, not per-user RLS. If you ever adopt RLS, revisit. Store only the hash server-side so a DB leak doesn't leak sessions.<text:line-break/><text:line-break/>2. Fix the global sign-out (fixes multi-device logout today)<text:line-break/><text:line-break/>Even before item 1 lands, sign_out() must stop revoking all devices:<text:line-break/><text:line-break/>client.auth.sign_out(options={"scope": "local"})<text:line-break/><text:line-break/>With item 1, this becomes revoke_device_session(token) and the problem disappears structurally.<text:line-break/><text:line-break/>3. Check two Supabase dashboard settings (5 minutes)<text:line-break/><text:line-break/>- Auth → Sessions → "Enforce single session per user" must be OFF, or every login kills the previous device no matter what your code does.<text:line-break/>- Check inactivity timeout / time-boxed sessions are unset. Either would log users out server-side regardless of cookies.<text:line-break/><text:line-break/>4. Replace st.cache_data.clear() with version-keyed invalidation (biggest post-sync speedup)<text:line-break/><text:line-break/>You already have the mechanism — _data_v is a parameter of _load_pitcher_plays — but then st.cache_data.clear() nukes everything: players, teams, the CSV run-lookup, sheet-name fetches. None of those changed during a plays sync, and refetching them is a large chunk of your post-sync slowness.<text:line-break/><text:line-break/><text:soft-page-break/>In the Sync MLN handler, delete st.cache_data.clear() and keep only the version bump. Then thread data_v into every loader whose data a sync can change (_load_team_offense_plays, _load_all_games, _load_game_plays currently lack it). One catch: database.py has its own @st.cache_data(ttl=300) on get_plays_for_team_offense — an inner cache that won't see the version bump. Remove that decorator (it's double-caching) or clear it specifically with db.get_plays_for_team_offense.clear().<text:line-break/><text:line-break/>With version keys doing invalidation, the ttl=3600 values are just a mid-session refetch tax; raise them (e.g. 6–24h) or drop TTL entirely on static data like the CSV lookup.<text:line-break/><text:line-break/>Tradeoff: you must be disciplined that every path that mutates plays also bumps _data_v, or users see stale data until TTL expiry.<text:line-break/><text:line-break/>5. Make the plays sync incremental<text:line-break/><text:line-break/>Every sync currently re-upserts every play ever. Query max(play_num) for the league first and only upsert newer rows:<text:line-break/><text:line-break/>resp = (client.table("plays").select("play_num").eq("league", "MLN")<text:line-break/> <text:s text:c="7"/>.order("play_num", desc=True).limit(1).execute().data)<text:line-break/>max_pn = resp[0]["play_num"] if resp else 0<text:line-break/>rows = [r for r in rows if r["play_num"] &gt; max_pn]<text:line-break/><text:line-break/>Note your outs/first-pitch trackers need the full sheet to compute correctly — keep computing over all plays, just filter what you upsert. Tradeoff: corrections to already-synced plays won't propagate; keep a "Full resync" button for that case.<text:line-break/><text:line-break/>6. Parallelize the sync's independent fetches and raise the chunk size<text:line-break/><text:line-break/>_qs_mln_plays does five sequential network operations (sheet read, get_games, teams lookup, players lookup, plus the games-tab read in _qs_mln_games). They're independent:<text:line-break/><text:line-break/>from concurrent.futures import ThreadPoolExecutor<text:line-break/>with ThreadPoolExecutor() as ex:<text:line-break/> <text:s text:c="3"/>f_plays <text:s text:c="2"/>= ex.submit(utils.read_mln_plays_from_sheet, _MLN_QS_SHEET_ID, tab="Plays (Raw)")<text:line-break/> <text:s text:c="3"/>f_games <text:s text:c="2"/>= ex.submit(db.get_games)<text:line-break/> <text:s text:c="3"/>f_teams <text:s text:c="2"/>= ex.submit(db.get_mln_teams_for_lookup)<text:line-break/> <text:s text:c="3"/>f_players = ex.submit(db.get_mln_players_for_lookup)<text:line-break/>plays, all_games, mln_teams, mln_players = (f_plays.result(), f_games.result(),<text:line-break/> <text:s text:c="43"/>f_teams.result(), f_players.result())<text:line-break/><text:line-break/>Also: _CHUNK = 500 doubles your round-trips versus 1000 (PostgREST's default page cap), for both _fetch_all and _bulk_upsert. And get_games() fetches select("*") when the sync only needs id, game_code, league — narrow it. Same idea applies to get_plays_for_pitcher/_batter: select("*, games(...)") ships every column of every play; selecting only the columns enrich_df actually uses cuts payload and parse time meaningfully on the page's hottest path.<text:line-break/><text:line-break/>Tradeoff: threads + narrow selects are low-risk; just keep the column list in one place so schema drift doesn't silently break enrichment.<text:line-break/><text:soft-page-break/><text:line-break/>7. Fragment the toggle-heavy sections of the Scouting page<text:line-break/><text:line-break/>Any widget inside an @st.fragment function reruns only that function. Your best candidates are sections that own display-only widgets: the Best/All-Zones toggle and its hint charts, the polar-view zone charts, the Signed toggle + delta histograms, the bucket-size sliders and their heatmaps. Pattern:<text:line-break/><text:line-break/>@st.fragment<text:line-break/>def _zone_charts_section(df_p: pd.DataFrame):<text:line-break/> <text:s text:c="3"/>polar = st.toggle("Polar view", key="polar_p")<text:line-break/> <text:s text:c="3"/>... <text:s/># all six zone charts<text:line-break/>_zone_charts_section(df_p)<text:line-break/><text:line-break/>Flipping the toggle then redraws six charts instead of re-executing the whole 2,500-line script. Two cautions: widgets outside the fragment still trigger full reruns (expected), and anything the fragment writes to session_state for other sections to read won't propagate until the next full rerun — keep fragments self-contained.<text:line-break/><text:line-break/>8. Don't fix: st.context.cookies itself<text:line-break/><text:line-break/>It reads cookies from the websocket connect-time headers — reliable across server restarts and the right tool. Your problem was never the read path; it's the rotating value being written unreliably, which item 1 eliminates.<text:line-break/><text:line-break/>---<text:line-break/>Suggested order of execution: 2 and 3 today (one-line fix plus dashboard check), then 1 (the real fix, ~an hour), then 4 (biggest perf win for least code), then 5–7 as time allow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3T23:55:49.541047900</meta:creation-date>
    <dc:date>2026-07-04T00:09:04.875979700</dc:date>
    <meta:editing-duration>PT13M16S</meta:editing-duration>
    <meta:editing-cycles>2</meta:editing-cycles>
    <meta:generator>LibreOffice/25.8.6.2$Windows_X86_64 LibreOffice_project/b4b39682cd9868fa725bc664aff94278d315bd04</meta:generator>
    <meta:document-statistic meta:table-count="0" meta:image-count="0" meta:object-count="0" meta:page-count="15" meta:paragraph-count="11" meta:word-count="3712" meta:character-count="34636" meta:non-whitespace-character-count="27383"/>
  </office:meta>
</office:document-meta>
</file>